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07b414" officeooo:paragraph-rsid="0007b414"/>
    </style:style>
    <style:style style:name="P5" style:family="paragraph" style:parent-style-name="Heading_20_1">
      <style:text-properties officeooo:paragraph-rsid="0007b414"/>
    </style:style>
    <style:style style:name="P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bfbfbf" loext:opacity="100%" style:font-name="system-ui" fo:font-size="12pt" fo:letter-spacing="normal" fo:font-style="normal" fo:font-weight="normal"/>
    </style:style>
    <style:style style:name="P7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8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9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10">
      <style:paragraph-properties fo:margin-left="0.026cm" fo:margin-right="0.026cm" fo:orphans="2" fo:widows="2" fo:text-indent="0cm" style:auto-text-indent="false" fo:padding="0cm" fo:border="none"/>
    </style:style>
    <style:style style:name="P17" style:family="paragraph" style:parent-style-name="Text_20_body" style:list-style-name="L11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12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12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13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14">
      <style:paragraph-properties fo:margin-left="0cm" fo:margin-right="0cm" fo:orphans="2" fo:widows="2" fo:text-indent="0cm" style:auto-text-indent="false" fo:padding="0cm" fo:border="none"/>
    </style:style>
    <style:style style:name="P22" style:family="paragraph" style:parent-style-name="Text_20_body" style:list-style-name="L15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17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18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18">
      <style:paragraph-properties fo:margin-left="0.026cm" fo:margin-right="0.026cm" fo:orphans="2" fo:widows="2" fo:text-indent="0cm" style:auto-text-indent="false" fo:padding="0cm" fo:border="none"/>
    </style:style>
    <style:style style:name="P26" style:family="paragraph" style:parent-style-name="Text_20_body" style:list-style-name="L19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20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21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22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22">
      <style:paragraph-properties fo:margin-left="0.026cm" fo:margin-right="0.026cm" fo:orphans="2" fo:widows="2" fo:text-indent="0cm" style:auto-text-indent="false" fo:padding="0cm" fo:border="none"/>
    </style:style>
    <style:style style:name="P31" style:family="paragraph" style:parent-style-name="Text_20_body" style:list-style-name="L23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32" style:family="paragraph" style:parent-style-name="Text_20_body" style:list-style-name="L24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33" style:family="paragraph" style:parent-style-name="Text_20_body" style:list-style-name="L25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34" style:family="paragraph" style:parent-style-name="Text_20_body" style:list-style-name="L26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35" style:family="paragraph" style:parent-style-name="Text_20_body" style:list-style-name="L26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27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29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30">
      <style:paragraph-properties fo:margin-left="0cm" fo:margin-right="0cm" fo:orphans="2" fo:widows="2" fo:text-indent="0cm" style:auto-text-indent="false" fo:padding="0cm" fo:border="none"/>
    </style:style>
    <style:style style:name="P39" style:family="paragraph" style:parent-style-name="Text_20_body" style:list-style-name="L31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40" style:family="paragraph" style:parent-style-name="Text_20_body" style:list-style-name="L32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41" style:family="paragraph" style:parent-style-name="Text_20_body" style:list-style-name="L32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42" style:family="paragraph" style:parent-style-name="Text_20_body" style:list-style-name="L33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43" style:family="paragraph" style:parent-style-name="Text_20_body" style:list-style-name="L34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44" style:family="paragraph" style:parent-style-name="Text_20_body" style:list-style-name="L35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45" style:family="paragraph" style:parent-style-name="Text_20_body" style:list-style-name="L36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46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7" style:family="paragraph" style:parent-style-name="Text_20_body" style:list-style-name="L37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48" style:family="paragraph" style:parent-style-name="Text_20_body" style:list-style-name="L37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3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38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</style:style>
    <style:style style:name="P51" style:family="paragraph" style:parent-style-name="Text_20_body" style:list-style-name="L38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52" style:family="paragraph" style:parent-style-name="Text_20_body" style:list-style-name="L2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53" style:family="paragraph" style:parent-style-name="Text_20_body" style:list-style-name="L4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54" style:family="paragraph" style:parent-style-name="Text_20_body" style:list-style-name="L6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55" style:family="paragraph" style:parent-style-name="Text_20_body" style:list-style-name="L8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56" style:family="paragraph" style:parent-style-name="Text_20_body" style:list-style-name="L12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57" style:family="paragraph" style:parent-style-name="Text_20_body" style:list-style-name="L16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58" style:family="paragraph" style:parent-style-name="Text_20_body" style:list-style-name="L24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59" style:family="paragraph" style:parent-style-name="Text_20_body" style:list-style-name="L26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60" style:family="paragraph" style:parent-style-name="Text_20_body" style:list-style-name="L28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61" style:family="paragraph" style:parent-style-name="Text_20_body" style:list-style-name="L30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62" style:family="paragraph" style:parent-style-name="Text_20_body" style:list-style-name="L32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63" style:family="paragraph" style:parent-style-name="Text_20_body" style:list-style-name="L37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64" style:family="paragraph" style:parent-style-name="Text_20_body" style:list-style-name="L38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P65" style:family="paragraph" style:parent-style-name="Text_20_body" style:list-style-name="L39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T1" style:family="text">
      <style:text-properties fo:font-variant="normal" fo:text-transform="none" fo:color="#8c8c8c" loext:opacity="100%" style:font-name="Ubuntu Mono" fo:font-size="7.5pt" fo:letter-spacing="normal" fo:font-style="normal" fo:font-weight="normal" fo:background-color="#262626" loext:char-shading-value="0" loext:padding="0cm" loext:border="none"/>
    </style:style>
    <style:style style:name="T2" style:family="text">
      <style:text-properties fo:font-variant="normal" fo:text-transform="none" fo:color="#8c8c8c" loext:opacity="100%" style:font-name="Ubuntu Mono" fo:font-size="7.5pt" fo:letter-spacing="normal" fo:font-style="normal" fo:font-weight="bold" fo:background-color="#262626" loext:char-shading-value="0" loext:padding="0cm" loext:border="none"/>
    </style:style>
    <style:style style:name="T3" style:family="text">
      <style:text-properties fo:font-variant="normal" fo:text-transform="none" fo:color="#bfbfbf" loext:opacity="100%" style:font-name="system-ui" fo:font-size="9.75pt" fo:letter-spacing="normal" fo:font-style="normal" fo:font-weight="normal"/>
    </style:style>
    <style:style style:name="T4" style:family="text">
      <style:text-properties fo:font-variant="normal" fo:text-transform="none" fo:color="#bfbfbf" loext:opacity="100%" style:font-name="system-ui" fo:font-size="9.75pt" fo:letter-spacing="normal" fo:font-style="normal" fo:font-weight="bold"/>
    </style:style>
    <style:style style:name="T5" style:family="text">
      <style:text-properties fo:font-variant="normal" fo:text-transform="none" fo:color="#bfbfbf" loext:opacity="100%" style:text-line-through-style="none" style:text-line-through-type="none" style:font-name="system-ui" fo:font-size="8.2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officeooo:rsid="0007b4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/>
      <text:h text:style-name="P4" text:outline-level="1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 text:protected="true">
            <text:p text:style-name="Contents_20_Heading">Tartalomjegyzék</text:p>
          </text:index-title>
          <text:p text:style-name="P1"><text:a xlink:type="simple" xlink:href="#__RefHeading___Toc91_1169632187" text:style-name="Index_20_Link" text:visited-style-name="Index_20_Link">GPT 4.1 promptjai<text:tab/>2</text:a></text:p>
          <text:p text:style-name="P2"><text:a xlink:type="simple" xlink:href="#__RefHeading___Toc93_1169632187" text:style-name="Index_20_Link" text:visited-style-name="Index_20_Link">1. Felhasználói kérdés<text:tab/>2</text:a></text:p>
          <text:p text:style-name="P3"><text:a xlink:type="simple" xlink:href="#__RefHeading___Toc95_1169632187" text:style-name="Index_20_Link" text:visited-style-name="Index_20_Link">Válasz<text:tab/>2</text:a></text:p>
          <text:p text:style-name="P2"><text:a xlink:type="simple" xlink:href="#__RefHeading___Toc97_1169632187" text:style-name="Index_20_Link" text:visited-style-name="Index_20_Link">2. Felhasználói kérdés<text:tab/>2</text:a></text:p>
          <text:p text:style-name="P3"><text:a xlink:type="simple" xlink:href="#__RefHeading___Toc99_1169632187" text:style-name="Index_20_Link" text:visited-style-name="Index_20_Link">Válasz<text:tab/>2</text:a></text:p>
          <text:p text:style-name="P2"><text:a xlink:type="simple" xlink:href="#__RefHeading___Toc101_1169632187" text:style-name="Index_20_Link" text:visited-style-name="Index_20_Link">3. Felhasználói kérdés<text:tab/>2</text:a></text:p>
          <text:p text:style-name="P3"><text:a xlink:type="simple" xlink:href="#__RefHeading___Toc103_1169632187" text:style-name="Index_20_Link" text:visited-style-name="Index_20_Link">Válasz<text:tab/>2</text:a></text:p>
          <text:p text:style-name="P2"><text:a xlink:type="simple" xlink:href="#__RefHeading___Toc105_1169632187" text:style-name="Index_20_Link" text:visited-style-name="Index_20_Link">4. Felhasználói kérdés<text:tab/>2</text:a></text:p>
          <text:p text:style-name="P3"><text:a xlink:type="simple" xlink:href="#__RefHeading___Toc107_1169632187" text:style-name="Index_20_Link" text:visited-style-name="Index_20_Link">Válasz<text:tab/>2</text:a></text:p>
          <text:p text:style-name="P2"><text:a xlink:type="simple" xlink:href="#__RefHeading___Toc109_1169632187" text:style-name="Index_20_Link" text:visited-style-name="Index_20_Link">5. Felhasználói kérdés<text:tab/>2</text:a></text:p>
          <text:p text:style-name="P3"><text:a xlink:type="simple" xlink:href="#__RefHeading___Toc111_1169632187" text:style-name="Index_20_Link" text:visited-style-name="Index_20_Link">Válasz<text:tab/>3</text:a></text:p>
          <text:p text:style-name="P2"><text:a xlink:type="simple" xlink:href="#__RefHeading___Toc113_1169632187" text:style-name="Index_20_Link" text:visited-style-name="Index_20_Link">6. Felhasználói kérdés<text:tab/>3</text:a></text:p>
          <text:p text:style-name="P3"><text:a xlink:type="simple" xlink:href="#__RefHeading___Toc115_1169632187" text:style-name="Index_20_Link" text:visited-style-name="Index_20_Link">Válasz<text:tab/>3</text:a></text:p>
          <text:p text:style-name="P2"><text:a xlink:type="simple" xlink:href="#__RefHeading___Toc117_1169632187" text:style-name="Index_20_Link" text:visited-style-name="Index_20_Link">7. Felhasználói kérdés<text:tab/>3</text:a></text:p>
          <text:p text:style-name="P3"><text:a xlink:type="simple" xlink:href="#__RefHeading___Toc119_1169632187" text:style-name="Index_20_Link" text:visited-style-name="Index_20_Link">Válasz<text:tab/>3</text:a></text:p>
          <text:p text:style-name="P2"><text:a xlink:type="simple" xlink:href="#__RefHeading___Toc121_1169632187" text:style-name="Index_20_Link" text:visited-style-name="Index_20_Link">8. Felhasználói kérdés<text:tab/>3</text:a></text:p>
          <text:p text:style-name="P3"><text:a xlink:type="simple" xlink:href="#__RefHeading___Toc123_1169632187" text:style-name="Index_20_Link" text:visited-style-name="Index_20_Link">Válasz<text:tab/>3</text:a></text:p>
          <text:p text:style-name="P2"><text:a xlink:type="simple" xlink:href="#__RefHeading___Toc125_1169632187" text:style-name="Index_20_Link" text:visited-style-name="Index_20_Link">9. Felhasználói kérdés<text:tab/>3</text:a></text:p>
          <text:p text:style-name="P3"><text:a xlink:type="simple" xlink:href="#__RefHeading___Toc127_1169632187" text:style-name="Index_20_Link" text:visited-style-name="Index_20_Link">Válasz<text:tab/>3</text:a></text:p>
          <text:p text:style-name="P2"><text:a xlink:type="simple" xlink:href="#__RefHeading___Toc129_1169632187" text:style-name="Index_20_Link" text:visited-style-name="Index_20_Link">10. Felhasználói kérdés<text:tab/>3</text:a></text:p>
          <text:p text:style-name="P3"><text:a xlink:type="simple" xlink:href="#__RefHeading___Toc131_1169632187" text:style-name="Index_20_Link" text:visited-style-name="Index_20_Link">Válasz<text:tab/>3</text:a></text:p>
          <text:p text:style-name="P2"><text:a xlink:type="simple" xlink:href="#__RefHeading___Toc133_1169632187" text:style-name="Index_20_Link" text:visited-style-name="Index_20_Link">11. Felhasználói kérdés<text:tab/>3</text:a></text:p>
          <text:p text:style-name="P3"><text:a xlink:type="simple" xlink:href="#__RefHeading___Toc135_1169632187" text:style-name="Index_20_Link" text:visited-style-name="Index_20_Link">Válasz<text:tab/>4</text:a></text:p>
          <text:p text:style-name="P2"><text:a xlink:type="simple" xlink:href="#__RefHeading___Toc137_1169632187" text:style-name="Index_20_Link" text:visited-style-name="Index_20_Link">12. Felhasználói kérdés<text:tab/>4</text:a></text:p>
          <text:p text:style-name="P3"><text:a xlink:type="simple" xlink:href="#__RefHeading___Toc139_1169632187" text:style-name="Index_20_Link" text:visited-style-name="Index_20_Link">Válasz<text:tab/>4</text:a></text:p>
          <text:p text:style-name="P2"><text:a xlink:type="simple" xlink:href="#__RefHeading___Toc141_1169632187" text:style-name="Index_20_Link" text:visited-style-name="Index_20_Link">13. Felhasználói kérdés<text:tab/>4</text:a></text:p>
          <text:p text:style-name="P3"><text:a xlink:type="simple" xlink:href="#__RefHeading___Toc143_1169632187" text:style-name="Index_20_Link" text:visited-style-name="Index_20_Link">Válasz<text:tab/>4</text:a></text:p>
          <text:p text:style-name="P2"><text:a xlink:type="simple" xlink:href="#__RefHeading___Toc145_1169632187" text:style-name="Index_20_Link" text:visited-style-name="Index_20_Link">14. Felhasználói kérdés<text:tab/>4</text:a></text:p>
          <text:p text:style-name="P3"><text:a xlink:type="simple" xlink:href="#__RefHeading___Toc147_1169632187" text:style-name="Index_20_Link" text:visited-style-name="Index_20_Link">Válasz<text:tab/>4</text:a></text:p>
          <text:p text:style-name="P2"><text:a xlink:type="simple" xlink:href="#__RefHeading___Toc149_1169632187" text:style-name="Index_20_Link" text:visited-style-name="Index_20_Link">15. Felhasználói kérdés<text:tab/>4</text:a></text:p>
          <text:p text:style-name="P3"><text:a xlink:type="simple" xlink:href="#__RefHeading___Toc151_1169632187" text:style-name="Index_20_Link" text:visited-style-name="Index_20_Link">Válasz<text:tab/>4</text:a></text:p>
          <text:p text:style-name="P2"><text:a xlink:type="simple" xlink:href="#__RefHeading___Toc153_1169632187" text:style-name="Index_20_Link" text:visited-style-name="Index_20_Link">16. Felhasználói kérdés<text:tab/>4</text:a></text:p>
          <text:p text:style-name="P3"><text:a xlink:type="simple" xlink:href="#__RefHeading___Toc155_1169632187" text:style-name="Index_20_Link" text:visited-style-name="Index_20_Link">Válasz<text:tab/>5</text:a></text:p>
          <text:p text:style-name="P2"><text:a xlink:type="simple" xlink:href="#__RefHeading___Toc157_1169632187" text:style-name="Index_20_Link" text:visited-style-name="Index_20_Link">17. Felhasználói kérdés<text:tab/>5</text:a></text:p>
          <text:p text:style-name="P3"><text:a xlink:type="simple" xlink:href="#__RefHeading___Toc159_1169632187" text:style-name="Index_20_Link" text:visited-style-name="Index_20_Link">Válasz<text:tab/>5</text:a></text:p>
          <text:p text:style-name="P2"><text:a xlink:type="simple" xlink:href="#__RefHeading___Toc161_1169632187" text:style-name="Index_20_Link" text:visited-style-name="Index_20_Link">18. Felhasználói kérdés<text:tab/>5</text:a></text:p>
          <text:p text:style-name="P3"><text:a xlink:type="simple" xlink:href="#__RefHeading___Toc163_1169632187" text:style-name="Index_20_Link" text:visited-style-name="Index_20_Link">Válasz<text:tab/>5</text:a></text:p>
          <text:p text:style-name="P2"><text:a xlink:type="simple" xlink:href="#__RefHeading___Toc165_1169632187" text:style-name="Index_20_Link" text:visited-style-name="Index_20_Link">Sikeres lépések<text:tab/>5</text:a></text:p>
          <text:p text:style-name="P2"><text:a xlink:type="simple" xlink:href="#__RefHeading___Toc167_1169632187" text:style-name="Index_20_Link" text:visited-style-name="Index_20_Link">Nem sikeres vagy még javítandó részek<text:tab/>6</text:a></text:p>
          <text:p text:style-name="P2"><text:a xlink:type="simple" xlink:href="#__RefHeading___Toc169_1169632187" text:style-name="Index_20_Link" text:visited-style-name="Index_20_Link">Összefoglaló<text:tab/>6</text:a></text:p>
          <text:p text:style-name="P1"><text:a xlink:type="simple" xlink:href="#__RefHeading___Toc171_1169632187" text:style-name="Index_20_Link" text:visited-style-name="Index_20_Link">Codex promptjai<text:tab/>6</text:a></text:p>
          <text:p text:style-name="P1"><text:a xlink:type="simple" xlink:href="#__RefHeading___Toc173_1169632187" text:style-name="Index_20_Link" text:visited-style-name="Index_20_Link">Codex prompt értékelések indoklások<text:tab/>23</text:a></text:p>
        </text:index-body>
      </text:table-of-content>
      <text:h text:style-name="P4" text:outline-level="1"><text:soft-page-break/></text:h>
      <text:h text:style-name="P5" text:outline-level="1"><text:bookmark-start text:name="__RefHeading___Toc91_1169632187"/><text:span text:style-name="T6">GPT 4.1 promptjai</text:span><text:bookmark-end text:name="__RefHeading___Toc91_1169632187"/></text:h>
      <text:h text:style-name="P6" text:outline-level="2"><text:bookmark-start text:name="__RefHeading___Toc93_1169632187"/>1. Felhasználói kérdés<text:bookmark-end text:name="__RefHeading___Toc93_1169632187"/></text:h>
      <text:list text:style-name="L1">
        <text:list-item>
          <text:p text:style-name="P8"><text:span text:style-name="Source_20_Text"><text:span text:style-name="T1">Szia AI! Ugye te azt teljesen jó érted, ha azt kérdezem tőled, hogy én akarok egy bevásárló lista alkalmazást, tudod, hogy miről beszélek?</text:span></text:span></text:p>
        </text:list-item>
      </text:list>
      <text:h text:style-name="P7" text:outline-level="3"><text:bookmark-start text:name="__RefHeading___Toc95_1169632187"/>Válasz<text:bookmark-end text:name="__RefHeading___Toc95_1169632187"/></text:h>
      <text:list text:style-name="L2">
        <text:list-item>
          <text:p text:style-name="P52">Igen, teljesen értem! Egy bevásárló lista alkalmazás általában egy egyszerű app, ahol a felhasználók listákat hozhatnak létre, elemeket adhatnak hozzá (pl. termékek neve, mennyisége), jelölhetik őket késznek, törölhetik őket, és esetleg kategorizálhatják vagy menthetik a listákat.</text:p>
        </text:list-item>
      </text:list>
      <text:h text:style-name="P6" text:outline-level="2"><text:bookmark-start text:name="__RefHeading___Toc97_1169632187"/>2. Felhasználói kérdés<text:bookmark-end text:name="__RefHeading___Toc97_1169632187"/></text:h>
      <text:list text:style-name="L3">
        <text:list-item>
          <text:p text:style-name="P9"><text:span text:style-name="Source_20_Text"><text:span text:style-name="T1">Szeretnék egy MEAN stack projektet készíteni. Írd le a projekt fő komponenseit, a mappa-struktúrát, és javasolj egy minimális működőképes verziót (MVP). A projekt témája: Egy bevásárló lista alkalmazás...</text:span></text:span></text:p>
        </text:list-item>
      </text:list>
      <text:h text:style-name="P7" text:outline-level="3"><text:bookmark-start text:name="__RefHeading___Toc99_1169632187"/>Válasz<text:bookmark-end text:name="__RefHeading___Toc99_1169632187"/></text:h>
      <text:list text:style-name="L4">
        <text:list-item>
          <text:p text:style-name="P53">Fő komponensek: Backend (Node.js + Express), MongoDB, Angular frontend, CORS, környezeti változók.</text:p>
        </text:list-item>
        <text:list-item>
          <text:p text:style-name="P10"><text:span text:style-name="T3">Mappa struktúra: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backend</text:span></text:a><text:span text:style-name="T3"> és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frontend</text:span></text:a><text:span text:style-name="T3"> könyvtárak.</text:span></text:p>
        </text:list-item>
        <text:list-item>
          <text:p text:style-name="P53">MVP: lista létrehozása, elem hozzáadása, kész jelölése, törlés, listanézet.</text:p>
        </text:list-item>
      </text:list>
      <text:h text:style-name="P6" text:outline-level="2"><text:bookmark-start text:name="__RefHeading___Toc101_1169632187"/>3. Felhasználói kérdés<text:bookmark-end text:name="__RefHeading___Toc101_1169632187"/></text:h>
      <text:list text:style-name="L5">
        <text:list-item>
          <text:p text:style-name="P11"><text:span text:style-name="Source_20_Text"><text:span text:style-name="T1">hogyan érdemes veled egy ilyen projektet leimplementálni, hogy ne legyen megakadás? ...</text:span></text:span></text:p>
        </text:list-item>
      </text:list>
      <text:h text:style-name="P7" text:outline-level="3"><text:bookmark-start text:name="__RefHeading___Toc103_1169632187"/>Válasz<text:bookmark-end text:name="__RefHeading___Toc103_1169632187"/></text:h>
      <text:list text:style-name="L6">
        <text:list-item>
          <text:p text:style-name="P54">Iteratív, moduláris haladás: alapok, teszt, majd bővítés.</text:p>
        </text:list-item>
        <text:list-item>
          <text:p text:style-name="P54">Konkrét lépések: backend, API végpont, frontend komponens, integráció.</text:p>
        </text:list-item>
      </text:list>
      <text:h text:style-name="P6" text:outline-level="2"><text:bookmark-start text:name="__RefHeading___Toc105_1169632187"/>4. Felhasználói kérdés<text:bookmark-end text:name="__RefHeading___Toc105_1169632187"/></text:h>
      <text:list text:style-name="L7">
        <text:list-item>
          <text:p text:style-name="P12"><text:span text:style-name="Source_20_Text"><text:span text:style-name="T1">Implementáld az alap backend szervert!</text:span></text:span></text:p>
        </text:list-item>
      </text:list>
      <text:h text:style-name="P7" text:outline-level="3"><text:bookmark-start text:name="__RefHeading___Toc107_1169632187"/>Válasz<text:bookmark-end text:name="__RefHeading___Toc107_1169632187"/></text:h>
      <text:list text:style-name="L8">
        <text:list-item>
          <text:p text:style-name="P55">Backend könyvtár létrehozása.</text:p>
        </text:list-item>
        <text:list-item>
          <text:p text:style-name="P13"><text:a xlink:type="simple" xlink:href="vscode-file://vscode-app/usr/share/code/resources/app/out/vs/code/electron-browser/workbench/workbench.html" text:style-name="Internet_20_link" text:visited-style-name="Visited_20_Internet_20_Link"><text:span text:style-name="T5">package.json</text:span></text:a><text:span text:style-name="T3">, </text:span><text:span text:style-name="Source_20_Text"><text:span text:style-name="T1">server.js</text:span></text:span><text:span text:style-name="T3">, </text:span><text:span text:style-name="Source_20_Text"><text:span text:style-name="T1">.env</text:span></text:span><text:span text:style-name="T3"> létrehozása Express + Mongoose + CORS.</text:span></text:p>
        </text:list-item>
        <text:list-item>
          <text:p text:style-name="P14"><text:span text:style-name="Source_20_Text"><text:span text:style-name="T1">npm install</text:span></text:span><text:span text:style-name="T3"> futtatása.</text:span></text:p>
        </text:list-item>
      </text:list>
      <text:h text:style-name="P6" text:outline-level="2"><text:bookmark-start text:name="__RefHeading___Toc109_1169632187"/>5. Felhasználói kérdés<text:bookmark-end text:name="__RefHeading___Toc109_1169632187"/></text:h>
      <text:list text:style-name="L9">
        <text:list-item>
          <text:p text:style-name="P15"><text:span text:style-name="Source_20_Text"><text:span text:style-name="T1">mi a hiba oka?</text:span></text:span></text:p>
        </text:list-item>
      </text:list>
      <text:h text:style-name="P7" text:outline-level="3"><text:bookmark-start text:name="__RefHeading___Toc111_1169632187"/><text:soft-page-break/>Válasz<text:bookmark-end text:name="__RefHeading___Toc111_1169632187"/></text:h>
      <text:list text:style-name="L10">
        <text:list-item>
          <text:p text:style-name="P16"><text:span text:style-name="T3">Az </text:span><text:span text:style-name="Source_20_Text"><text:span text:style-name="T1">npm start</text:span></text:span><text:span text:style-name="T3"> parancsot a gyökérben futtattad, nem 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backend</text:span></text:a><text:span text:style-name="T3"> mappában. 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package.json</text:span></text:a><text:span text:style-name="T3"> 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backend</text:span></text:a><text:span text:style-name="T3"> alatt van.</text:span></text:p>
        </text:list-item>
      </text:list>
      <text:h text:style-name="P6" text:outline-level="2"><text:bookmark-start text:name="__RefHeading___Toc113_1169632187"/>6. Felhasználói kérdés<text:bookmark-end text:name="__RefHeading___Toc113_1169632187"/></text:h>
      <text:list text:style-name="L11">
        <text:list-item>
          <text:p text:style-name="P17"><text:span text:style-name="Source_20_Text"><text:span text:style-name="T1">A mongodb - t dockeresen állítsd össze, dokker fileból legyen indítható.</text:span></text:span></text:p>
        </text:list-item>
      </text:list>
      <text:h text:style-name="P7" text:outline-level="3"><text:bookmark-start text:name="__RefHeading___Toc115_1169632187"/>Válasz<text:bookmark-end text:name="__RefHeading___Toc115_1169632187"/></text:h>
      <text:list text:style-name="L12">
        <text:list-item>
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5">docker-compose.yml</text:span></text:a><text:span text:style-name="T3"> létrehozása MongoDB szolgáltatással.</text:span></text:p>
        </text:list-item>
        <text:list-item>
          <text:p text:style-name="P19"><text:span text:style-name="Source_20_Text"><text:span text:style-name="T1">.env</text:span></text:span><text:span text:style-name="T3"> frissítése Docker Mongo URI-val.</text:span></text:p>
        </text:list-item>
        <text:list-item>
          <text:p text:style-name="P56">Docker telepítés ellenőrzése és konténer indítása.</text:p>
        </text:list-item>
      </text:list>
      <text:h text:style-name="P6" text:outline-level="2"><text:bookmark-start text:name="__RefHeading___Toc117_1169632187"/>7. Felhasználói kérdés<text:bookmark-end text:name="__RefHeading___Toc117_1169632187"/></text:h>
      <text:list text:style-name="L13">
        <text:list-item>
          <text:p text:style-name="P20"><text:span text:style-name="Source_20_Text"><text:span text:style-name="T1">A warning mire vonatkozik?</text:span></text:span></text:p>
        </text:list-item>
      </text:list>
      <text:h text:style-name="P7" text:outline-level="3"><text:bookmark-start text:name="__RefHeading___Toc119_1169632187"/>Válasz<text:bookmark-end text:name="__RefHeading___Toc119_1169632187"/></text:h>
      <text:list text:style-name="L14">
        <text:list-item>
          <text:p text:style-name="P21"><text:span text:style-name="T3">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docker-compose.yml</text:span></text:a><text:span text:style-name="T3"> </text:span><text:span text:style-name="Source_20_Text"><text:span text:style-name="T1">version: '3.8'</text:span></text:span><text:span text:style-name="T3"> sora elavult, figyelmen kívül hagyja.</text:span></text:p>
        </text:list-item>
      </text:list>
      <text:h text:style-name="P6" text:outline-level="2"><text:bookmark-start text:name="__RefHeading___Toc121_1169632187"/>8. Felhasználói kérdés<text:bookmark-end text:name="__RefHeading___Toc121_1169632187"/></text:h>
      <text:list text:style-name="L15">
        <text:list-item>
          <text:p text:style-name="P22"><text:span text:style-name="Source_20_Text"><text:span text:style-name="T1">a git init parancsot itt a gyökér mappában kell kiadni?</text:span></text:span></text:p>
        </text:list-item>
      </text:list>
      <text:h text:style-name="P7" text:outline-level="3"><text:bookmark-start text:name="__RefHeading___Toc123_1169632187"/>Válasz<text:bookmark-end text:name="__RefHeading___Toc123_1169632187"/></text:h>
      <text:list text:style-name="L16">
        <text:list-item>
          <text:p text:style-name="P57">Igen, a projekt gyökerében kell. Meg is történt.</text:p>
        </text:list-item>
      </text:list>
      <text:h text:style-name="P6" text:outline-level="2"><text:bookmark-start text:name="__RefHeading___Toc125_1169632187"/>9. Felhasználói kérdés<text:bookmark-end text:name="__RefHeading___Toc125_1169632187"/></text:h>
      <text:list text:style-name="L17">
        <text:list-item>
          <text:p text:style-name="P23"><text:span text:style-name="Source_20_Text"><text:span text:style-name="T1">Eddig melyik az a fájl vagy mappa amelyiket nem érdemes, nem biztonságos feltenni a github -ra?</text:span></text:span></text:p>
        </text:list-item>
      </text:list>
      <text:h text:style-name="P7" text:outline-level="3"><text:bookmark-start text:name="__RefHeading___Toc127_1169632187"/>Válasz<text:bookmark-end text:name="__RefHeading___Toc127_1169632187"/></text:h>
      <text:list text:style-name="L18">
        <text:list-item>
          <text:p text:style-name="P24"><text:span text:style-name="Source_20_Text"><text:span text:style-name="T1">.env</text:span></text:span><text:span text:style-name="T3">, </text:span><text:span text:style-name="Source_20_Text"><text:span text:style-name="T1">node_modules/</text:span></text:span><text:span text:style-name="T3">, logok, IDE mappák.</text:span></text:p>
        </text:list-item>
        <text:list-item>
          <text:p text:style-name="P25"><text:a xlink:type="simple" xlink:href="vscode-file://vscode-app/usr/share/code/resources/app/out/vs/code/electron-browser/workbench/workbench.html" text:style-name="Internet_20_link" text:visited-style-name="Visited_20_Internet_20_Link"><text:span text:style-name="T5">.gitignore</text:span></text:a><text:span text:style-name="T3"> létrehozása.</text:span></text:p>
        </text:list-item>
      </text:list>
      <text:h text:style-name="P6" text:outline-level="2"><text:bookmark-start text:name="__RefHeading___Toc129_1169632187"/>10. Felhasználói kérdés<text:bookmark-end text:name="__RefHeading___Toc129_1169632187"/></text:h>
      <text:list text:style-name="L19">
        <text:list-item>
          <text:p text:style-name="P26"><text:span text:style-name="Source_20_Text"><text:span text:style-name="T1">A githubon létre van hozva az üres repo, milyen parancsokkal tudom a projektet feltölteni?</text:span></text:span></text:p>
        </text:list-item>
      </text:list>
      <text:h text:style-name="P7" text:outline-level="3"><text:bookmark-start text:name="__RefHeading___Toc131_1169632187"/>Válasz<text:bookmark-end text:name="__RefHeading___Toc131_1169632187"/></text:h>
      <text:list text:style-name="L20">
        <text:list-item>
          <text:p text:style-name="P27"><text:span text:style-name="Source_20_Text"><text:span text:style-name="T1">git add .</text:span></text:span></text:p>
        </text:list-item>
        <text:list-item>
          <text:p text:style-name="P27"><text:span text:style-name="Source_20_Text"><text:span text:style-name="T1">git commit -m "..."</text:span></text:span></text:p>
        </text:list-item>
        <text:list-item>
          <text:p text:style-name="P27"><text:span text:style-name="Source_20_Text"><text:span text:style-name="T1">git remote add origin ...</text:span></text:span></text:p>
        </text:list-item>
        <text:list-item>
          <text:p text:style-name="P27"><text:span text:style-name="Source_20_Text"><text:span text:style-name="T1">git push -u origin master</text:span></text:span></text:p>
        </text:list-item>
      </text:list>
      <text:h text:style-name="P6" text:outline-level="2"><text:bookmark-start text:name="__RefHeading___Toc133_1169632187"/>11. Felhasználói kérdés<text:bookmark-end text:name="__RefHeading___Toc133_1169632187"/></text:h>
      <text:list text:style-name="L21">
        <text:list-item>
          <text:p text:style-name="P28"><text:span text:style-name="Source_20_Text"><text:span text:style-name="T1">Kérlek javasolj api végpontokat az eddig specifikált funkciókhoz!</text:span></text:span></text:p>
        </text:list-item>
      </text:list>
      <text:h text:style-name="P7" text:outline-level="3"><text:bookmark-start text:name="__RefHeading___Toc135_1169632187"/><text:soft-page-break/>Válasz<text:bookmark-end text:name="__RefHeading___Toc135_1169632187"/></text:h>
      <text:list text:style-name="L22"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GET /api/lists</text:span></text:a></text:p>
        </text:list-item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POST /api/lists</text:span></text:a></text:p>
        </text:list-item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GET /api/lists/:id</text:span></text:a></text:p>
        </text:list-item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PUT /api/lists/:id</text:span></text:a></text:p>
        </text:list-item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DELETE /api/lists/:id</text:span></text:a></text:p>
        </text:list-item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GET /api/lists/:listId/items</text:span></text:a></text:p>
        </text:list-item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POST /api/lists/:listId/items</text:span></text:a></text:p>
        </text:list-item>
        <text:list-item>
          <text:p text:style-name="P29"><text:a xlink:type="simple" xlink:href="vscode-file://vscode-app/usr/share/code/resources/app/out/vs/code/electron-browser/workbench/workbench.html" text:style-name="Internet_20_link" text:visited-style-name="Visited_20_Internet_20_Link"><text:span text:style-name="T5">PUT /api/lists/:listId/items/:itemId</text:span></text:a></text:p>
        </text:list-item>
        <text:list-item>
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5">DELETE /api/lists/:listId/items/:itemId</text:span></text:a></text:p>
        </text:list-item>
      </text:list>
      <text:h text:style-name="P6" text:outline-level="2"><text:bookmark-start text:name="__RefHeading___Toc137_1169632187"/>12. Felhasználói kérdés<text:bookmark-end text:name="__RefHeading___Toc137_1169632187"/></text:h>
      <text:list text:style-name="L23">
        <text:list-item>
          <text:p text:style-name="P31"><text:span text:style-name="Source_20_Text"><text:span text:style-name="T1">Igen, ezeket mind implementáld!</text:span></text:span></text:p>
        </text:list-item>
      </text:list>
      <text:h text:style-name="P7" text:outline-level="3"><text:bookmark-start text:name="__RefHeading___Toc139_1169632187"/>Válasz<text:bookmark-end text:name="__RefHeading___Toc139_1169632187"/></text:h>
      <text:list text:style-name="L24">
        <text:list-item>
          <text:p text:style-name="P58">Modellek és route-ok létrehozása.</text:p>
        </text:list-item>
        <text:list-item>
          <text:p text:style-name="P32"><text:a xlink:type="simple" xlink:href="vscode-file://vscode-app/usr/share/code/resources/app/out/vs/code/electron-browser/workbench/workbench.html" text:style-name="Internet_20_link" text:visited-style-name="Visited_20_Internet_20_Link"><text:span text:style-name="T5">List.js</text:span></text:a><text:span text:style-name="T3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Item.js</text:span></text:a><text:span text:style-name="T3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lists.js</text:span></text:a><text:span text:style-name="T3"> implementáció.</text:span></text:p>
        </text:list-item>
        <text:list-item>
          <text:p text:style-name="P58">Backend frissítése route regisztrációval.</text:p>
        </text:list-item>
      </text:list>
      <text:h text:style-name="P6" text:outline-level="2"><text:bookmark-start text:name="__RefHeading___Toc141_1169632187"/>13. Felhasználói kérdés<text:bookmark-end text:name="__RefHeading___Toc141_1169632187"/></text:h>
      <text:list text:style-name="L25">
        <text:list-item>
          <text:p text:style-name="P33"><text:span text:style-name="Source_20_Text"><text:span text:style-name="T1">Kérlek csinálj mindegyik végponthoz néhány teszt esetet és tedd őket egy fájlba...</text:span></text:span></text:p>
        </text:list-item>
      </text:list>
      <text:h text:style-name="P7" text:outline-level="3"><text:bookmark-start text:name="__RefHeading___Toc143_1169632187"/>Válasz<text:bookmark-end text:name="__RefHeading___Toc143_1169632187"/></text:h>
      <text:list text:style-name="L26">
        <text:list-item>
          <text:p text:style-name="P34"><text:span text:style-name="Source_20_Text"><text:span text:style-name="T1">test.js</text:span></text:span><text:span text:style-name="T3"> létrehozása backendben.</text:span></text:p>
        </text:list-item>
        <text:list-item>
          <text:p text:style-name="P35"><text:span text:style-name="Source_20_Text"><text:span text:style-name="T1">npm test</text:span></text:span><text:span text:style-name="T3"> hozzáadás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package.json</text:span></text:a><text:span text:style-name="T3">-hoz.</text:span></text:p>
        </text:list-item>
        <text:list-item>
          <text:p text:style-name="P59">E2E tesztek listákhoz és elemekhez.</text:p>
        </text:list-item>
      </text:list>
      <text:h text:style-name="P6" text:outline-level="2"><text:bookmark-start text:name="__RefHeading___Toc145_1169632187"/>14. Felhasználói kérdés<text:bookmark-end text:name="__RefHeading___Toc145_1169632187"/></text:h>
      <text:list text:style-name="L27">
        <text:list-item>
          <text:p text:style-name="P36"><text:span text:style-name="Source_20_Text"><text:span text:style-name="T1">a user és az admin létrehozását mikor javaslod?</text:span></text:span></text:p>
        </text:list-item>
      </text:list>
      <text:h text:style-name="P7" text:outline-level="3"><text:bookmark-start text:name="__RefHeading___Toc147_1169632187"/>Válasz<text:bookmark-end text:name="__RefHeading___Toc147_1169632187"/></text:h>
      <text:list text:style-name="L28">
        <text:list-item>
          <text:p text:style-name="P60">Frontend után, de közvetlenül az integráció előtt.</text:p>
        </text:list-item>
        <text:list-item>
          <text:p text:style-name="P60">Előbb MVP, aztán autentikáció.</text:p>
        </text:list-item>
      </text:list>
      <text:h text:style-name="P6" text:outline-level="2"><text:bookmark-start text:name="__RefHeading___Toc149_1169632187"/>15. Felhasználói kérdés<text:bookmark-end text:name="__RefHeading___Toc149_1169632187"/></text:h>
      <text:list text:style-name="L29">
        <text:list-item>
          <text:p text:style-name="P37"><text:span text:style-name="Source_20_Text"><text:span text:style-name="T1">Ha szeretnék egy olyan funkciót ... hogy a user lista itemjeit sorba is tudja rakni ...</text:span></text:span></text:p>
        </text:list-item>
      </text:list>
      <text:h text:style-name="P7" text:outline-level="3"><text:bookmark-start text:name="__RefHeading___Toc151_1169632187"/>Válasz<text:bookmark-end text:name="__RefHeading___Toc151_1169632187"/></text:h>
      <text:list text:style-name="L30">
        <text:list-item>
          <text:p text:style-name="P61">Most érdemes backendben figyelni a sorrendre.</text:p>
        </text:list-item>
        <text:list-item>
          <text:p text:style-name="P38"><text:a xlink:type="simple" xlink:href="vscode-file://vscode-app/usr/share/code/resources/app/out/vs/code/electron-browser/workbench/workbench.html" text:style-name="Internet_20_link" text:visited-style-name="Visited_20_Internet_20_Link"><text:span text:style-name="T5">order</text:span></text:a><text:span text:style-name="T3"> mező és </text:span><text:span text:style-name="Source_20_Text"><text:span text:style-name="T1">PUT /api/lists/:listId/reorder</text:span></text:span><text:span text:style-name="T3">.</text:span></text:p>
        </text:list-item>
      </text:list>
      <text:h text:style-name="P6" text:outline-level="2"><text:bookmark-start text:name="__RefHeading___Toc153_1169632187"/>16. Felhasználói kérdés<text:bookmark-end text:name="__RefHeading___Toc153_1169632187"/></text:h>
      <text:list text:style-name="L31">
        <text:list-item>
          <text:p text:style-name="P39"><text:span text:style-name="Source_20_Text"><text:span text:style-name="T1">Módosítsd az Item modellt order mezővel, és készítsd el a reorder API végpontot</text:span></text:span></text:p>
        </text:list-item>
      </text:list>
      <text:h text:style-name="P7" text:outline-level="3"><text:bookmark-start text:name="__RefHeading___Toc155_1169632187"/><text:soft-page-break/>Válasz<text:bookmark-end text:name="__RefHeading___Toc155_1169632187"/></text:h>
      <text:list text:style-name="L32">
        <text:list-item>
          <text:p text:style-name="P40"><text:a xlink:type="simple" xlink:href="vscode-file://vscode-app/usr/share/code/resources/app/out/vs/code/electron-browser/workbench/workbench.html" text:style-name="Internet_20_link" text:visited-style-name="Visited_20_Internet_20_Link"><text:span text:style-name="T5">Item</text:span></text:a><text:span text:style-name="T3"> modell módosítás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order</text:span></text:a><text:span text:style-name="T3"> mezővel.</text:span></text:p>
        </text:list-item>
        <text:list-item>
          <text:p text:style-name="P41"><text:span text:style-name="Source_20_Text"><text:span text:style-name="T1">reorder</text:span></text:span><text:span text:style-name="T3"> végpont hozzáadása.</text:span></text:p>
        </text:list-item>
        <text:list-item>
          <text:p text:style-name="P62">Tesztfrissítés.</text:p>
        </text:list-item>
      </text:list>
      <text:h text:style-name="P6" text:outline-level="2"><text:bookmark-start text:name="__RefHeading___Toc157_1169632187"/>17. Felhasználói kérdés<text:bookmark-end text:name="__RefHeading___Toc157_1169632187"/></text:h>
      <text:list text:style-name="L33">
        <text:list-item>
          <text:p text:style-name="P42"><text:span text:style-name="Source_20_Text"><text:span text:style-name="T1">mi a curl hivása a sorrend módosításhoz?</text:span></text:span></text:p>
        </text:list-item>
      </text:list>
      <text:h text:style-name="P7" text:outline-level="3"><text:bookmark-start text:name="__RefHeading___Toc159_1169632187"/>Válasz<text:bookmark-end text:name="__RefHeading___Toc159_1169632187"/></text:h>
      <text:list text:style-name="L34">
        <text:list-item>
          <text:p text:style-name="P43"><text:span text:style-name="Source_20_Text"><text:span text:style-name="T1">curl -X PUT http://localhost:3000/api/lists/{listId}/reorder -H "Content-Type: application/json" -d '{"itemIds": ["itemId1","itemId2"]}'</text:span></text:span></text:p>
        </text:list-item>
      </text:list>
      <text:h text:style-name="P6" text:outline-level="2"><text:bookmark-start text:name="__RefHeading___Toc161_1169632187"/>18. Felhasználói kérdés<text:bookmark-end text:name="__RefHeading___Toc161_1169632187"/></text:h>
      <text:list text:style-name="L35">
        <text:list-item>
          <text:p text:style-name="P44"><text:span text:style-name="Source_20_Text"><text:span text:style-name="T1">hogy szerzem meg a &lt;PID&gt; -et?</text:span></text:span></text:p>
        </text:list-item>
      </text:list>
      <text:h text:style-name="P7" text:outline-level="3"><text:bookmark-start text:name="__RefHeading___Toc163_1169632187"/>Válasz<text:bookmark-end text:name="__RefHeading___Toc163_1169632187"/></text:h>
      <text:list text:style-name="L36">
        <text:list-item>
          <text:p text:style-name="P45"><text:span text:style-name="Source_20_Text"><text:span text:style-name="T1">lsof -i :3000</text:span></text:span></text:p>
        </text:list-item>
        <text:list-item>
          <text:p text:style-name="P45"><text:span text:style-name="Source_20_Text"><text:span text:style-name="T1">ps aux | grep node</text:span></text:span></text:p>
        </text:list-item>
      </text:list>
      <text:p text:style-name="Standard"/>
      <text:p text:style-name="Standard"/>
      <text:h text:style-name="Heading_20_2" text:outline-level="2"><text:bookmark-start text:name="__RefHeading___Toc165_1169632187"/>Sikeres lépések<text:bookmark-end text:name="__RefHeading___Toc165_1169632187"/></text:h>
      <text:list text:style-name="L37">
        <text:list-item>
          <text:p text:style-name="P46"><text:span text:style-name="Strong_20_Emphasis"><text:span text:style-name="T4">Backend alapok létrehozása</text:span></text:span></text:p>
          <text:list>
            <text:list-item>
              <text:p text:style-name="P48"><text:a xlink:type="simple" xlink:href="vscode-file://vscode-app/usr/share/code/resources/app/out/vs/code/electron-browser/workbench/workbench.html" text:style-name="Internet_20_link" text:visited-style-name="Visited_20_Internet_20_Link"><text:span text:style-name="T5">package.json</text:span></text:a><text:span text:style-name="T3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server.js</text:span></text:a><text:span text:style-name="T3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.env</text:span></text:a></text:p>
            </text:list-item>
            <text:list-item>
              <text:p text:style-name="P48"><text:span text:style-name="T3">Miért sikeres: a kód elkészült, a szerver elindult 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backend</text:span></text:a><text:span text:style-name="T3"> mappában.</text:span></text:p>
            </text:list-item>
          </text:list>
        </text:list-item>
        <text:list-item>
          <text:p text:style-name="P46"><text:span text:style-name="Strong_20_Emphasis"><text:span text:style-name="T4">Docker Compose MongoDB beállítása</text:span></text:span></text:p>
          <text:list>
            <text:list-item>
              <text:p text:style-name="P48"><text:a xlink:type="simple" xlink:href="vscode-file://vscode-app/usr/share/code/resources/app/out/vs/code/electron-browser/workbench/workbench.html" text:style-name="Internet_20_link" text:visited-style-name="Visited_20_Internet_20_Link"><text:span text:style-name="T5">docker-compose.yml</text:span></text:a><text:span text:style-name="T3"> létrehozása MongoDB-vel</text:span></text:p>
            </text:list-item>
            <text:list-item>
              <text:p text:style-name="P47"><text:span text:style-name="Source_20_Text"><text:span text:style-name="T1">.env</text:span></text:span><text:span text:style-name="T3"> frissítése Dockeres URI-val</text:span></text:p>
            </text:list-item>
            <text:list-item>
              <text:p text:style-name="P63">Miért sikeres: a MongoDB konténer elindult, a backend csatlakozni tudott hozzá.</text:p>
            </text:list-item>
          </text:list>
        </text:list-item>
        <text:list-item>
          <text:p text:style-name="P46"><text:span text:style-name="Strong_20_Emphasis"><text:span text:style-name="T4">Git repository inicializálása és feltöltése</text:span></text:span></text:p>
          <text:list>
            <text:list-item>
              <text:p text:style-name="P48"><text:a xlink:type="simple" xlink:href="vscode-file://vscode-app/usr/share/code/resources/app/out/vs/code/electron-browser/workbench/workbench.html" text:style-name="Internet_20_link" text:visited-style-name="Visited_20_Internet_20_Link"><text:span text:style-name="T5">.gitignore</text:span></text:a><text:span text:style-name="T3"> készítése</text:span></text:p>
            </text:list-item>
            <text:list-item>
              <text:p text:style-name="P47"><text:span text:style-name="Source_20_Text"><text:span text:style-name="T1">git init</text:span></text:span><text:span text:style-name="T3">, </text:span><text:span text:style-name="Source_20_Text"><text:span text:style-name="T1">git add .</text:span></text:span><text:span text:style-name="T3">, </text:span><text:span text:style-name="Source_20_Text"><text:span text:style-name="T1">git commit</text:span></text:span><text:span text:style-name="T3">, </text:span><text:span text:style-name="Source_20_Text"><text:span text:style-name="T1">git push</text:span></text:span></text:p>
            </text:list-item>
            <text:list-item>
              <text:p text:style-name="P63">Miért sikeres: a projekt felkerült GitHub-ra és a változások verziókezelve vannak.</text:p>
            </text:list-item>
          </text:list>
        </text:list-item>
        <text:list-item>
          <text:p text:style-name="P46"><text:span text:style-name="Strong_20_Emphasis"><text:span text:style-name="T4">API végpontok implementálása</text:span></text:span></text:p>
          <text:list>
            <text:list-item>
              <text:p text:style-name="P48"><text:a xlink:type="simple" xlink:href="vscode-file://vscode-app/usr/share/code/resources/app/out/vs/code/electron-browser/workbench/workbench.html" text:style-name="Internet_20_link" text:visited-style-name="Visited_20_Internet_20_Link"><text:span text:style-name="T5">List</text:span></text:a><text:span text:style-name="T3"> és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Item</text:span></text:a><text:span text:style-name="T3"> modellek</text:span></text:p>
            </text:list-item>
            <text:list-item>
              <text:p text:style-name="P47"><text:span text:style-name="Source_20_Text"><text:span text:style-name="T1">GET/POST/PUT/DELETE</text:span></text:span><text:span text:style-name="T3"> listákhoz</text:span></text:p>
            </text:list-item>
            <text:list-item>
              <text:p text:style-name="P47"><text:span text:style-name="Source_20_Text"><text:span text:style-name="T1">GET/POST/PUT/DELETE</text:span></text:span><text:span text:style-name="T3"> elemekhez</text:span></text:p>
            </text:list-item>
            <text:list-item>
              <text:p text:style-name="P63">Miért sikeres: a backend API-ok készen lettek és használhatók.</text:p>
            </text:list-item>
          </text:list>
        </text:list-item>
        <text:list-item>
          <text:p text:style-name="P46"><text:span text:style-name="Strong_20_Emphasis"><text:span text:style-name="T4">Tesztfájl létrehozása</text:span></text:span></text:p>
          <text:list>
            <text:list-item>
              <text:p text:style-name="P48"><text:a xlink:type="simple" xlink:href="vscode-file://vscode-app/usr/share/code/resources/app/out/vs/code/electron-browser/workbench/workbench.html" text:style-name="Internet_20_link" text:visited-style-name="Visited_20_Internet_20_Link"><text:span text:style-name="T5">test.js</text:span></text:a></text:p>
            </text:list-item>
            <text:list-item>
              <text:p text:style-name="P47"><text:span text:style-name="Source_20_Text"><text:span text:style-name="T1">npm test</text:span></text:span><text:span text:style-name="T3"> script hozzáadása</text:span></text:p>
            </text:list-item>
            <text:list-item>
              <text:p text:style-name="P63"><text:soft-page-break/>Miért sikeres: egy parancsra futtatható tesztfájl áll rendelkezésre.</text:p>
            </text:list-item>
          </text:list>
        </text:list-item>
        <text:list-item>
          <text:p text:style-name="P46"><text:span text:style-name="Strong_20_Emphasis"><text:span text:style-name="T4">Sorrend mentés funkció hozzáadása</text:span></text:span></text:p>
          <text:list>
            <text:list-item>
              <text:p text:style-name="P48"><text:a xlink:type="simple" xlink:href="vscode-file://vscode-app/usr/share/code/resources/app/out/vs/code/electron-browser/workbench/workbench.html" text:style-name="Internet_20_link" text:visited-style-name="Visited_20_Internet_20_Link"><text:span text:style-name="T5">order</text:span></text:a><text:span text:style-name="T3"> mező az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Item</text:span></text:a><text:span text:style-name="T3"> modellben</text:span></text:p>
            </text:list-item>
            <text:list-item>
              <text:p text:style-name="P47"><text:span text:style-name="Source_20_Text"><text:span text:style-name="T1">PUT /api/lists/:listId/reorder</text:span></text:span></text:p>
            </text:list-item>
            <text:list-item>
              <text:p text:style-name="P63">Miért sikeres: a backend készen áll a sorrend mentésére, és a GET lekérés rendezetten adja vissza az elemeket.</text:p>
            </text:list-item>
          </text:list>
        </text:list-item>
      </text:list>
      <text:p text:style-name="Horizontal_20_Line"/>
      <text:h text:style-name="Heading_20_2" text:outline-level="2"><text:bookmark-start text:name="__RefHeading___Toc167_1169632187"/>Nem sikeres vagy még javítandó részek<text:bookmark-end text:name="__RefHeading___Toc167_1169632187"/></text:h>
      <text:list text:style-name="L38">
        <text:list-item>
          <text:p text:style-name="P49"><text:span text:style-name="Strong_20_Emphasis"><text:span text:style-name="Source_20_Text"><text:span text:style-name="T2">npm start</text:span></text:span></text:span><text:span text:style-name="Strong_20_Emphasis"><text:span text:style-name="T4"> rossz mappában</text:span></text:span></text:p>
          <text:list>
            <text:list-item>
              <text:p text:style-name="P51"><text:span text:style-name="T3">Hiba: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package.json</text:span></text:a><text:span text:style-name="T3"> nem volt a gyökérben</text:span></text:p>
            </text:list-item>
            <text:list-item>
              <text:p text:style-name="P51"><text:span text:style-name="T3">Miért nem sikeres: a parancs a projekt gyökérben futott, nem a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5">backend</text:span></text:a><text:span text:style-name="T3"> mappában.</text:span></text:p>
            </text:list-item>
          </text:list>
        </text:list-item>
        <text:list-item>
          <text:p text:style-name="P49"><text:span text:style-name="Strong_20_Emphasis"><text:span text:style-name="T4">Docker permission issue</text:span></text:span></text:p>
          <text:list>
            <text:list-item>
              <text:p text:style-name="P50"><text:span text:style-name="T3">Hiba: </text:span><text:span text:style-name="Source_20_Text"><text:span text:style-name="T1">permission denied while trying to connect to the docker API</text:span></text:span></text:p>
            </text:list-item>
            <text:list-item>
              <text:p text:style-name="P64">Miért nem sikeres: Docker sockethoz nem volt jogosultság, sudo kellett.</text:p>
            </text:list-item>
          </text:list>
        </text:list-item>
        <text:list-item>
          <text:p text:style-name="P49"><text:span text:style-name="Strong_20_Emphasis"><text:span text:style-name="Source_20_Text"><text:span text:style-name="T2">reorder</text:span></text:span></text:span><text:span text:style-name="Strong_20_Emphasis"><text:span text:style-name="T4"> végpont kezdeti 404-es hiba</text:span></text:span></text:p>
          <text:list>
            <text:list-item>
              <text:p text:style-name="P50"><text:span text:style-name="T3">Hiba: a routeok sorrendje miatt az Express rosszul értelmezte a </text:span><text:span text:style-name="Source_20_Text"><text:span text:style-name="T1">reorder</text:span></text:span><text:span text:style-name="T3">-t</text:span></text:p>
            </text:list-item>
            <text:list-item>
              <text:p text:style-name="P64">Miért nem sikeres: a specifikus útvonalakat korábban kellett volna elhelyezni.</text:p>
            </text:list-item>
          </text:list>
        </text:list-item>
        <text:list-item>
          <text:p text:style-name="P49"><text:span text:style-name="Strong_20_Emphasis"><text:span text:style-name="T4">Port ütközés a 3000-es porton</text:span></text:span></text:p>
          <text:list>
            <text:list-item>
              <text:p text:style-name="P50"><text:span text:style-name="T3">Hiba: </text:span><text:span text:style-name="Source_20_Text"><text:span text:style-name="T1">EADDRINUSE: address already in use :::3000</text:span></text:span></text:p>
            </text:list-item>
            <text:list-item>
              <text:p text:style-name="P64">Miért nem sikeres: volt már futó szerver a 3000-es porton, ezért nem indult új példány.</text:p>
            </text:list-item>
          </text:list>
        </text:list-item>
        <text:list-item>
          <text:p text:style-name="P49"><text:span text:style-name="Strong_20_Emphasis"><text:span text:style-name="Source_20_Text"><text:span text:style-name="T2">npm test</text:span></text:span></text:span><text:span text:style-name="Strong_20_Emphasis"><text:span text:style-name="T4"> </text:span></text:span><text:span text:style-name="Strong_20_Emphasis"><text:span text:style-name="Source_20_Text"><text:span text:style-name="T2">ECONNREFUSED</text:span></text:span></text:span></text:p>
          <text:list>
            <text:list-item>
              <text:p text:style-name="P64">Hiba: a teszt a backendhez próbált kapcsolódni, de a szerver nem futott</text:p>
            </text:list-item>
            <text:list-item>
              <text:p text:style-name="P64">Miért nem sikeres: maga a teszt logikája jó, de a futtatási környezet nem volt elindítva.</text:p>
            </text:list-item>
          </text:list>
        </text:list-item>
      </text:list>
      <text:p text:style-name="Horizontal_20_Line"/>
      <text:h text:style-name="P6" text:outline-level="2"><text:bookmark-start text:name="__RefHeading___Toc169_1169632187"/>Összefoglaló<text:bookmark-end text:name="__RefHeading___Toc169_1169632187"/></text:h>
      <text:list text:style-name="L39">
        <text:list-item>
          <text:p text:style-name="P65">A backend implementáció és a funkcionalitások nagyrészt késznek tekinthetők.</text:p>
        </text:list-item>
        <text:list-item>
          <text:p text:style-name="P65">A fő problémák inkább környezeti/első indítási hibák voltak, nem a logikai implementáció hibái.</text:p>
        </text:list-item>
        <text:list-item>
          <text:p text:style-name="P65">Ha szeretnéd, segítek most abban, hogy a szerver stabilan fusson, és utána mehet a frontend.</text:p>
        </text:list-item>
      </text:list>
      <text:h text:style-name="Heading_20_1" text:outline-level="1"><text:bookmark-start text:name="__RefHeading___Toc171_1169632187"/>Codex promptjai<text:bookmark-end text:name="__RefHeading___Toc171_1169632187"/></text:h>
      <text:p text:style-name="Text_20_body"/>
      <text:p text:style-name="Text_20_body"/>
      <text:p text:style-name="Text_20_body"/>
      <text:p text:style-name="Text_20_body">PROMPT:</text:p>
      <text:p text:style-name="Text_20_body">látod a szessönt?</text:p>
      <text:p text:style-name="Text_20_body"><text:soft-page-break/></text:p>
      <text:p text:style-name="Text_20_body">VÁLASZ:</text:p>
      <text:p text:style-name="Text_20_body">Igen, látom a session kontextusát: a workspace a Rf_Dinnyes_balazs01 mappában van, az aktív fájl a backend/src/routes/lists.js, és látom a megnyitott tabokat is: Item.js, List.js, .gitignore, server.js. Nem látom automatikusan a fájlok teljes tartalmát, de be tudom olvasni őket, ha ránézzek valamire.</text:p>
      <text:p text:style-name="Text_20_body"/>
      <text:p text:style-name="Text_20_body">---</text:p>
      <text:p text:style-name="Text_20_body"/>
      <text:p text:style-name="Text_20_body">PROMPT:</text:p>
      <text:p text:style-name="Text_20_body">Most kérlek adj rövid útmutatást, lépéseket a frontend és a többi lépés létrehozására. Milyen promtokat vársz? Amint látod, egy bevásálró lista rendszert fejlesztek.</text:p>
      <text:p text:style-name="Text_20_body"/>
      <text:p text:style-name="Text_20_body">VÁLASZ:</text:p>
      <text:p text:style-name="Text_20_body">Egy bevásárlólista rendszerhez a javasolt lépések:</text:p>
      <text:p text:style-name="Text_20_body">1. Backend stabilizálása.</text:p>
      <text:p text:style-name="Text_20_body">2. Route-ok ellenőrzése listákhoz és itemekhez.</text:p>
      <text:p text:style-name="Text_20_body">3. Angular vagy React frontend létrehozása.</text:p>
      <text:p text:style-name="Text_20_body">4. API kapcsolat kialakítása.</text:p>
      <text:p text:style-name="Text_20_body">5. Alap funkciók megvalósítása: lista létrehozás, item hozzáadás, kipipálás, törlés.</text:p>
      <text:p text:style-name="Text_20_body">6. Később login, admin, kategóriák, boltok, keresés, rendezés.</text:p>
      <text:p text:style-name="Text_20_body"/>
      <text:p text:style-name="Text_20_body">Javasolt promptok:</text:p>
      <text:p text:style-name="Text_20_body">- Nézd át a backend jelenlegi route-jait és modelleket.</text:p>
      <text:p text:style-name="Text_20_body">- Egészítsd ki a backend API-t teljes CRUD működéssel.</text:p>
      <text:p text:style-name="Text_20_body">- Hozz létre egy React/Vite vagy Angular frontendet.</text:p>
      <text:p text:style-name="Text_20_body">- Kösd össze a frontendet a backend /lists route-jaival.</text:p>
      <text:p text:style-name="Text_20_body">- Készíts egy modern bevásárlólista felületet.</text:p>
      <text:p text:style-name="Text_20_body">- Futtasd le az appot és javítsd ki a hibákat.</text:p>
      <text:p text:style-name="Text_20_body"/>
      <text:p text:style-name="Text_20_body">---</text:p>
      <text:p text:style-name="Text_20_body"/>
      <text:p text:style-name="Text_20_body">PROMPT:</text:p>
      <text:p text:style-name="Text_20_body">Én most mean stack - ben dolgozok. Hozd létre az alap angular projektet!</text:p>
      <text:p text:style-name="Text_20_body"><text:soft-page-break/></text:p>
      <text:p text:style-name="Text_20_body">VÁLASZ:</text:p>
      <text:p text:style-name="Text_20_body">Létrejött az Angular alap frontend a frontend/ mappában.</text:p>
      <text:p text:style-name="Text_20_body">Beállítások:</text:p>
      <text:p text:style-name="Text_20_body">- Angular 19</text:p>
      <text:p text:style-name="Text_20_body">- routing</text:p>
      <text:p text:style-name="Text_20_body">- SCSS</text:p>
      <text:p text:style-name="Text_20_body">- HttpClient provider</text:p>
      <text:p text:style-name="Text_20_body">- backend proxy: /api -&gt; http://localhost:3000</text:p>
      <text:p text:style-name="Text_20_body">- alap kezdőképernyő</text:p>
      <text:p text:style-name="Text_20_body">- modellek és service a bevásárlólista API-hoz</text:p>
      <text:p text:style-name="Text_20_body"/>
      <text:p text:style-name="Text_20_body">Fontos fájlok:</text:p>
      <text:p text:style-name="Text_20_body">- frontend/src/app/models/shopping-list.model.ts</text:p>
      <text:p text:style-name="Text_20_body">- frontend/src/app/services/lists.service.ts</text:p>
      <text:p text:style-name="Text_20_body">- frontend/proxy.conf.json</text:p>
      <text:p text:style-name="Text_20_body"/>
      <text:p text:style-name="Text_20_body">A frontend dev szerver:</text:p>
      <text:p text:style-name="Text_20_body">http://localhost:4200/</text:p>
      <text:p text:style-name="Text_20_body"/>
      <text:p text:style-name="Text_20_body">Ellenőrzés:</text:p>
      <text:p text:style-name="Text_20_body">npm run build sikeresen lefutott.</text:p>
      <text:p text:style-name="Text_20_body"/>
      <text:p text:style-name="Text_20_body">---</text:p>
      <text:p text:style-name="Text_20_body"/>
      <text:p text:style-name="Text_20_body">PROMPT:</text:p>
      <text:p text:style-name="Text_20_body">miután létrehoztad az angular frontendet a mostani backendhez, kösd össze a frontendet a backend /lists route-jaival.</text:p>
      <text:p text:style-name="Text_20_body"/>
      <text:p text:style-name="Text_20_body">VÁLASZ:</text:p>
      <text:p text:style-name="Text_20_body">Az Angular frontend össze lett kötve a backend /api/lists route-jaival.</text:p>
      <text:p text:style-name="Text_20_body"/>
      <text:p text:style-name="Text_20_body"><text:soft-page-break/>Megvalósított funkciók:</text:p>
      <text:p text:style-name="Text_20_body">- GET /api/lists</text:p>
      <text:p text:style-name="Text_20_body">- POST /api/lists</text:p>
      <text:p text:style-name="Text_20_body">- DELETE /api/lists/:id</text:p>
      <text:p text:style-name="Text_20_body">- GET /api/lists/:listId/items</text:p>
      <text:p text:style-name="Text_20_body">- POST /api/lists/:listId/items</text:p>
      <text:p text:style-name="Text_20_body">- PUT /api/lists/:listId/items/:itemId</text:p>
      <text:p text:style-name="Text_20_body">- DELETE /api/lists/:listId/items/:itemId</text:p>
      <text:p text:style-name="Text_20_body"/>
      <text:p text:style-name="Text_20_body">Fontos fájlok:</text:p>
      <text:p text:style-name="Text_20_body">- frontend/src/app/app.component.ts</text:p>
      <text:p text:style-name="Text_20_body">- frontend/src/app/app.component.html</text:p>
      <text:p text:style-name="Text_20_body">- frontend/src/app/services/lists.service.ts</text:p>
      <text:p text:style-name="Text_20_body">- frontend/proxy.conf.json</text:p>
      <text:p text:style-name="Text_20_body"/>
      <text:p text:style-name="Text_20_body">A frontend fut:</text:p>
      <text:p text:style-name="Text_20_body">http://localhost:4200/</text:p>
      <text:p text:style-name="Text_20_body"/>
      <text:p text:style-name="Text_20_body">---</text:p>
      <text:p text:style-name="Text_20_body"/>
      <text:p text:style-name="Text_20_body">PROMPT:</text:p>
      <text:p text:style-name="Text_20_body">Készíts egy egyszerű, modern bevásárlólista felületet: bal oldalt listák, jobb oldalt a kiválasztott lista elemei.</text:p>
      <text:p text:style-name="Text_20_body"/>
      <text:p text:style-name="Text_20_body">VÁLASZ:</text:p>
      <text:p text:style-name="Text_20_body">Elkészült egy modern kétpaneles bevásárlólista felület.</text:p>
      <text:p text:style-name="Text_20_body"/>
      <text:p text:style-name="Text_20_body">Bal oldalt:</text:p>
      <text:p text:style-name="Text_20_body">- listák megjelenítése</text:p>
      <text:p text:style-name="Text_20_body">- új lista létrehozása</text:p>
      <text:p text:style-name="Text_20_body">- aktív lista kijelölése</text:p>
      <text:p text:style-name="Text_20_body"/>
      <text:p text:style-name="Text_20_body"><text:soft-page-break/>Jobb oldalt:</text:p>
      <text:p text:style-name="Text_20_body">- kiválasztott lista fejléc</text:p>
      <text:p text:style-name="Text_20_body">- összes elem / kész elemek / becsült összeg</text:p>
      <text:p text:style-name="Text_20_body">- új termék hozzáadása névvel, mennyiséggel, árral</text:p>
      <text:p text:style-name="Text_20_body">- termék kipipálása</text:p>
      <text:p text:style-name="Text_20_body">- termék törlése</text:p>
      <text:p text:style-name="Text_20_body">- lista törlése</text:p>
      <text:p text:style-name="Text_20_body"/>
      <text:p text:style-name="Text_20_body">Módosított fájlok:</text:p>
      <text:p text:style-name="Text_20_body">- frontend/src/app/app.component.html</text:p>
      <text:p text:style-name="Text_20_body">- frontend/src/app/app.component.scss</text:p>
      <text:p text:style-name="Text_20_body"/>
      <text:p text:style-name="Text_20_body">Ellenőrzés:</text:p>
      <text:p text:style-name="Text_20_body">npm run build sikeresen lefutott.</text:p>
      <text:p text:style-name="Text_20_body"/>
      <text:p text:style-name="Text_20_body">---</text:p>
      <text:p text:style-name="Text_20_body"/>
      <text:p text:style-name="Text_20_body">PROMPT:</text:p>
      <text:p text:style-name="Text_20_body">Most kérlek azt valósítsd meg, hogy látsz a backandnél egy item sorba rendező funkciót, kérlet azt vidd át a frontendre, hogy a listák itemjeit moussal lehessen sorba rendezni húzással!</text:p>
      <text:p text:style-name="Text_20_body"/>
      <text:p text:style-name="Text_20_body">VÁLASZ:</text:p>
      <text:p text:style-name="Text_20_body">Megvalósult az itemek húzással történő rendezése.</text:p>
      <text:p text:style-name="Text_20_body"/>
      <text:p text:style-name="Text_20_body">Működés:</text:p>
      <text:p text:style-name="Text_20_body">- az item sor elején megjelent egy :: fogantyú</text:p>
      <text:p text:style-name="Text_20_body">- egérrel húzható az item</text:p>
      <text:p text:style-name="Text_20_body">- drop után a frontend meghívja:</text:p>
      <text:p text:style-name="Text_20_body"><text:s text:c="2"/>PUT /api/lists/:listId/reorder</text:p>
      <text:p text:style-name="Text_20_body">- a sorrend azonnal frissül a UI-ban</text:p>
      <text:p text:style-name="Text_20_body">- backend menti az új sorrendet</text:p>
      <text:p text:style-name="Text_20_body">- hiba esetén visszaáll az előző sorrend</text:p>
      <text:p text:style-name="Text_20_body"><text:soft-page-break/></text:p>
      <text:p text:style-name="Text_20_body">Módosított fájlok:</text:p>
      <text:p text:style-name="Text_20_body">- frontend/src/app/app.component.ts</text:p>
      <text:p text:style-name="Text_20_body">- frontend/src/app/app.component.html</text:p>
      <text:p text:style-name="Text_20_body">- frontend/src/app/app.component.scss</text:p>
      <text:p text:style-name="Text_20_body"/>
      <text:p text:style-name="Text_20_body">---</text:p>
      <text:p text:style-name="Text_20_body"/>
      <text:p text:style-name="Text_20_body">PROMPT:</text:p>
      <text:p text:style-name="Text_20_body">Most kellene egy admin, user autentikáció megvalósítása. Az adminnak kellene egy külön menedzser oldal, ahol törölheti a usereket, ha akarja, meg látja a regisztrált adatait. A usereknek is hozzd létre a regisztráló, bejelentkező felületet. A jelszó legyen hash -elve mentve és kezelve megfelelően az adadtbázisban!</text:p>
      <text:p text:style-name="Text_20_body"/>
      <text:p text:style-name="Text_20_body">VÁLASZ:</text:p>
      <text:p text:style-name="Text_20_body">Megvalósult az admin/user autentikáció.</text:p>
      <text:p text:style-name="Text_20_body"/>
      <text:p text:style-name="Text_20_body">Backend:</text:p>
      <text:p text:style-name="Text_20_body">- új User modell</text:p>
      <text:p text:style-name="Text_20_body">- bcryptjs jelszó hash</text:p>
      <text:p text:style-name="Text_20_body">- JWT alapú auth</text:p>
      <text:p text:style-name="Text_20_body">- auth middleware</text:p>
      <text:p text:style-name="Text_20_body">- admin route-ok</text:p>
      <text:p text:style-name="Text_20_body"/>
      <text:p text:style-name="Text_20_body">Új backend fájlok:</text:p>
      <text:p text:style-name="Text_20_body">- backend/src/models/User.js</text:p>
      <text:p text:style-name="Text_20_body">- backend/src/routes/auth.js</text:p>
      <text:p text:style-name="Text_20_body">- backend/src/routes/admin.js</text:p>
      <text:p text:style-name="Text_20_body">- backend/src/middleware/auth.js</text:p>
      <text:p text:style-name="Text_20_body"/>
      <text:p text:style-name="Text_20_body">Route-ok:</text:p>
      <text:p text:style-name="Text_20_body">- POST /api/auth/register</text:p>
      <text:p text:style-name="Text_20_body">- POST /api/auth/login</text:p>
      <text:p text:style-name="Text_20_body"><text:soft-page-break/>- GET /api/auth/me</text:p>
      <text:p text:style-name="Text_20_body">- GET /api/admin/users</text:p>
      <text:p text:style-name="Text_20_body">- DELETE /api/admin/users/:id</text:p>
      <text:p text:style-name="Text_20_body"/>
      <text:p text:style-name="Text_20_body">Frontend:</text:p>
      <text:p text:style-name="Text_20_body">- login felület</text:p>
      <text:p text:style-name="Text_20_body">- regisztrációs felület</text:p>
      <text:p text:style-name="Text_20_body">- token mentése localStorage-ba</text:p>
      <text:p text:style-name="Text_20_body">- Authorization Bearer token automatikus küldése</text:p>
      <text:p text:style-name="Text_20_body">- kijelentkezés</text:p>
      <text:p text:style-name="Text_20_body">- admin panel</text:p>
      <text:p text:style-name="Text_20_body">- userek listázása</text:p>
      <text:p text:style-name="Text_20_body">- user törlése</text:p>
      <text:p text:style-name="Text_20_body"/>
      <text:p text:style-name="Text_20_body">Fontos:</text:p>
      <text:p text:style-name="Text_20_body">Az első regisztrált felhasználó automatikusan admin lesz.</text:p>
      <text:p text:style-name="Text_20_body"/>
      <text:p text:style-name="Text_20_body">---</text:p>
      <text:p text:style-name="Text_20_body"/>
      <text:p text:style-name="Text_20_body">PROMPT:</text:p>
      <text:p text:style-name="Text_20_body">gondolom az adminnak valami előre létrehozott bejelentkező adatai vannak, azt oszd meg itt velem.</text:p>
      <text:p text:style-name="Text_20_body"/>
      <text:p text:style-name="Text_20_body">VÁLASZ:</text:p>
      <text:p text:style-name="Text_20_body">Nincs előre létrehozott admin belépési adat.</text:p>
      <text:p text:style-name="Text_20_body">Az első regisztrált felhasználó automatikusan admin lesz.</text:p>
      <text:p text:style-name="Text_20_body"/>
      <text:p text:style-name="Text_20_body">Példa első regisztráció:</text:p>
      <text:p text:style-name="Text_20_body">Név: Admin</text:p>
      <text:p text:style-name="Text_20_body">Email: admin@example.com</text:p>
      <text:p text:style-name="Text_20_body">Jelszó: admin123</text:p>
      <text:p text:style-name="Text_20_body"/>
      <text:p text:style-name="Text_20_body">Ha már van user az adatbázisban, akkor az új regisztráció már sima user lesz.</text:p>
      <text:p text:style-name="Text_20_body"><text:soft-page-break/></text:p>
      <text:p text:style-name="Text_20_body">---</text:p>
      <text:p text:style-name="Text_20_body"/>
      <text:p text:style-name="Text_20_body">PROMPT:</text:p>
      <text:p text:style-name="Text_20_body">azt írja, hogy sikertelen regisztráció, nem enged semmilyen adattal regisztrálni</text:p>
      <text:p text:style-name="Text_20_body"/>
      <text:p text:style-name="Text_20_body">VÁLASZ:</text:p>
      <text:p text:style-name="Text_20_body">A hiba oka az volt, hogy a 3000-es porton egy régi backend példány futott, amelyben még nem volt /api/auth/register route.</text:p>
      <text:p text:style-name="Text_20_body"/>
      <text:p text:style-name="Text_20_body">Megoldás:</text:p>
      <text:p text:style-name="Text_20_body">- régi backend folyamatok leállítása</text:p>
      <text:p text:style-name="Text_20_body">- aktuális auth-os backend újraindítása</text:p>
      <text:p text:style-name="Text_20_body"/>
      <text:p text:style-name="Text_20_body">Teszt eredmény:</text:p>
      <text:p text:style-name="Text_20_body">POST /api/auth/register -&gt; 201 Created</text:p>
      <text:p text:style-name="Text_20_body"/>
      <text:p text:style-name="Text_20_body">A teszt közben létrejött admin user:</text:p>
      <text:p text:style-name="Text_20_body">Email: testuser@example.com</text:p>
      <text:p text:style-name="Text_20_body">Jelszó: admin123</text:p>
      <text:p text:style-name="Text_20_body">Role: admin</text:p>
      <text:p text:style-name="Text_20_body"/>
      <text:p text:style-name="Text_20_body">A frontend auth hibaüzenet is javítva lett, hogy a backend konkrét hibáját jelenítse meg.</text:p>
      <text:p text:style-name="Text_20_body"/>
      <text:p text:style-name="Text_20_body">---</text:p>
      <text:p text:style-name="Text_20_body"/>
      <text:p text:style-name="Text_20_body">PROMPT:</text:p>
      <text:p text:style-name="Text_20_body">ha egy listát törölni akarok, akkor kérdezzen rá hogy tényleg törölni akajra - e a user vagy admin. A jelszó mezőnél, mind a bejelentkezésnél, mind a regisztrációnl legyen láthatósági opció, illetve a regisztrációnál legyen dupla egyezőség ellenőrzési beviteli lehetőség!</text:p>
      <text:p text:style-name="Text_20_body"/>
      <text:p text:style-name="Text_20_body">VÁLASZ:</text:p>
      <text:p text:style-name="Text_20_body">Megvalósult:</text:p>
      <text:p text:style-name="Text_20_body"><text:soft-page-break/>- lista törlés előtt megerősítő ablak</text:p>
      <text:p text:style-name="Text_20_body">- admin user törlés előtt megerősítő ablak</text:p>
      <text:p text:style-name="Text_20_body">- login jelszómezőnél Mutat / Elrejt gomb</text:p>
      <text:p text:style-name="Text_20_body">- regisztrációnál jelszó láthatóság opció</text:p>
      <text:p text:style-name="Text_20_body">- regisztrációnál jelszó megerősítő mező</text:p>
      <text:p text:style-name="Text_20_body">- a két jelszónak egyeznie kell, különben nem engedi elküldeni</text:p>
      <text:p text:style-name="Text_20_body"/>
      <text:p text:style-name="Text_20_body">Módosított fájlok:</text:p>
      <text:p text:style-name="Text_20_body">- frontend/src/app/app.component.ts</text:p>
      <text:p text:style-name="Text_20_body">- frontend/src/app/app.component.html</text:p>
      <text:p text:style-name="Text_20_body">- frontend/src/app/app.component.scss</text:p>
      <text:p text:style-name="Text_20_body"/>
      <text:p text:style-name="Text_20_body">---</text:p>
      <text:p text:style-name="Text_20_body"/>
      <text:p text:style-name="Text_20_body">PROMPT:</text:p>
      <text:p text:style-name="Text_20_body">Az oldalakra mindenhol tegyél egy halovány kosár vagy valami étel vagy gyümölcs hátteret, mindenhol ugyanaz legyen.</text:p>
      <text:p text:style-name="Text_20_body"/>
      <text:p text:style-name="Text_20_body">VÁLASZ:</text:p>
      <text:p text:style-name="Text_20_body">Minden oldal egységes halvány bevásárlós/gyümölcsös hátteret kapott.</text:p>
      <text:p text:style-name="Text_20_body"/>
      <text:p text:style-name="Text_20_body">Új asset:</text:p>
      <text:p text:style-name="Text_20_body">- frontend/public/food-pattern.svg</text:p>
      <text:p text:style-name="Text_20_body"/>
      <text:p text:style-name="Text_20_body">Megjelenik:</text:p>
      <text:p text:style-name="Text_20_body">- bejelentkezésnél</text:p>
      <text:p text:style-name="Text_20_body">- regisztrációnál</text:p>
      <text:p text:style-name="Text_20_body">- főoldalon</text:p>
      <text:p text:style-name="Text_20_body">- admin felületen</text:p>
      <text:p text:style-name="Text_20_body"/>
      <text:p text:style-name="Text_20_body">Módosított fájl:</text:p>
      <text:p text:style-name="Text_20_body">- frontend/src/app/app.component.scss</text:p>
      <text:p text:style-name="Text_20_body"><text:soft-page-break/></text:p>
      <text:p text:style-name="Text_20_body">---</text:p>
      <text:p text:style-name="Text_20_body"/>
      <text:p text:style-name="Text_20_body">PROMPT:</text:p>
      <text:p text:style-name="Text_20_body">A főoldalon lehessen váltani sötét vagy világos megjelentítés között egy sarki ikonnal, ami egy szép ikon legyen</text:p>
      <text:p text:style-name="Text_20_body"/>
      <text:p text:style-name="Text_20_body">VÁLASZ:</text:p>
      <text:p text:style-name="Text_20_body">Megvalósult a világos/sötét mód váltás.</text:p>
      <text:p text:style-name="Text_20_body"/>
      <text:p text:style-name="Text_20_body">Működés:</text:p>
      <text:p text:style-name="Text_20_body">- jobb felső sarokban ikon gomb</text:p>
      <text:p text:style-name="Text_20_body">- világos módban hold ikon látszik</text:p>
      <text:p text:style-name="Text_20_body">- sötét módban nap ikon látszik</text:p>
      <text:p text:style-name="Text_20_body">- kattintásra vált a téma</text:p>
      <text:p text:style-name="Text_20_body">- választás localStorage-ba mentődik</text:p>
      <text:p text:style-name="Text_20_body">- frissítés után is megmarad</text:p>
      <text:p text:style-name="Text_20_body"/>
      <text:p text:style-name="Text_20_body">A sötét mód érinti:</text:p>
      <text:p text:style-name="Text_20_body">- hátteret</text:p>
      <text:p text:style-name="Text_20_body">- paneleket</text:p>
      <text:p text:style-name="Text_20_body">- listákat</text:p>
      <text:p text:style-name="Text_20_body">- inputokat</text:p>
      <text:p text:style-name="Text_20_body">- admin sort</text:p>
      <text:p text:style-name="Text_20_body">- gombokat</text:p>
      <text:p text:style-name="Text_20_body"/>
      <text:p text:style-name="Text_20_body">---</text:p>
      <text:p text:style-name="Text_20_body"/>
      <text:p text:style-name="Text_20_body">PROMPT:</text:p>
      <text:p text:style-name="Text_20_body">ha az admi törölni akar egy usert, akkor kérdezzen rá egy ablak, illetve a törlés sikerességét egy felugró snackbar jelezze 2 másodpercig.</text:p>
      <text:p text:style-name="Text_20_body"/>
      <text:p text:style-name="Text_20_body"><text:soft-page-break/>VÁLASZ:</text:p>
      <text:p text:style-name="Text_20_body">Admin user törlésnél:</text:p>
      <text:p text:style-name="Text_20_body">- először megerősítő ablak jelenik meg</text:p>
      <text:p text:style-name="Text_20_body">- jóváhagyás és sikeres törlés után snackbar jelenik meg</text:p>
      <text:p text:style-name="Text_20_body">- snackbar szövege:</text:p>
      <text:p text:style-name="Text_20_body"><text:s text:c="2"/>Felhasznalo sikeresen torolve.</text:p>
      <text:p text:style-name="Text_20_body">- 2 másodperc után automatikusan eltűnik</text:p>
      <text:p text:style-name="Text_20_body">- világos és sötét módban is működik</text:p>
      <text:p text:style-name="Text_20_body"/>
      <text:p text:style-name="Text_20_body">---</text:p>
      <text:p text:style-name="Text_20_body"/>
      <text:p text:style-name="Text_20_body">PROMPT:</text:p>
      <text:p text:style-name="Text_20_body">Kellene még, hogy a user tudjon keresni a listái között, kell egy kereső mező és ahogy írom be a nevet változzon a listák listája is.!</text:p>
      <text:p text:style-name="Text_20_body"/>
      <text:p text:style-name="Text_20_body">VÁLASZ:</text:p>
      <text:p text:style-name="Text_20_body">Megvalósult a listák közötti keresés.</text:p>
      <text:p text:style-name="Text_20_body"/>
      <text:p text:style-name="Text_20_body">Funkciók:</text:p>
      <text:p text:style-name="Text_20_body">- keresőmező a bal oldali listapanelen</text:p>
      <text:p text:style-name="Text_20_body">- gépelés közben azonnali szűrés</text:p>
      <text:p text:style-name="Text_20_body">- lista név alapján keres</text:p>
      <text:p text:style-name="Text_20_body">- ha nincs találat, megjelenik:</text:p>
      <text:p text:style-name="Text_20_body"><text:s text:c="2"/>Nincs talalat</text:p>
      <text:p text:style-name="Text_20_body"/>
      <text:p text:style-name="Text_20_body">Módosított fájlok:</text:p>
      <text:p text:style-name="Text_20_body">- frontend/src/app/app.component.ts</text:p>
      <text:p text:style-name="Text_20_body">- frontend/src/app/app.component.html</text:p>
      <text:p text:style-name="Text_20_body">- frontend/src/app/app.component.scss</text:p>
      <text:p text:style-name="Text_20_body"/>
      <text:p text:style-name="Text_20_body">---</text:p>
      <text:p text:style-name="Text_20_body"/>
      <text:p text:style-name="Text_20_body"><text:soft-page-break/>PROMPT:</text:p>
      <text:p text:style-name="Text_20_body">most jelen pillanatban hány adatbázis entitást/kollekciót a használ a projekt?</text:p>
      <text:p text:style-name="Text_20_body"/>
      <text:p text:style-name="Text_20_body">VÁLASZ:</text:p>
      <text:p text:style-name="Text_20_body">A projekt ekkor 3 adatbázis entitást / MongoDB kollekciót használt:</text:p>
      <text:p text:style-name="Text_20_body"/>
      <text:p text:style-name="Text_20_body">1. User</text:p>
      <text:p text:style-name="Text_20_body">Kollekció: users</text:p>
      <text:p text:style-name="Text_20_body">Felhasználók, admin/user role, email, hash-elt jelszó</text:p>
      <text:p text:style-name="Text_20_body"/>
      <text:p text:style-name="Text_20_body">2. List</text:p>
      <text:p text:style-name="Text_20_body">Kollekció: lists</text:p>
      <text:p text:style-name="Text_20_body">Bevásárlólisták, userhez kötve userId alapján</text:p>
      <text:p text:style-name="Text_20_body"/>
      <text:p text:style-name="Text_20_body">3. Item</text:p>
      <text:p text:style-name="Text_20_body">Kollekció: items</text:p>
      <text:p text:style-name="Text_20_body">Listaelemek, listához kötve listId alapján</text:p>
      <text:p text:style-name="Text_20_body"/>
      <text:p text:style-name="Text_20_body">Kapcsolatok:</text:p>
      <text:p text:style-name="Text_20_body">User 1 - N List</text:p>
      <text:p text:style-name="Text_20_body">List 1 - N Item</text:p>
      <text:p text:style-name="Text_20_body"/>
      <text:p text:style-name="Text_20_body">---</text:p>
      <text:p text:style-name="Text_20_body"/>
      <text:p text:style-name="Text_20_body">PROMPT:</text:p>
      <text:p text:style-name="Text_20_body">mMilyen további 2 kollekcióval lehetne bővíteni az adatbázist ebben a bevásárló lista alkalmazásban? Szerinted?</text:p>
      <text:p text:style-name="Text_20_body"/>
      <text:p text:style-name="Text_20_body">VÁLASZ:</text:p>
      <text:p text:style-name="Text_20_body">Két javasolt új kollekció:</text:p>
      <text:p text:style-name="Text_20_body"/>
      <text:p text:style-name="Text_20_body">1. Category / Kategória</text:p>
      <text:p text:style-name="Text_20_body"><text:soft-page-break/>Kollekció: categories</text:p>
      <text:p text:style-name="Text_20_body"/>
      <text:p text:style-name="Text_20_body">Példák:</text:p>
      <text:p text:style-name="Text_20_body">- Zöldség</text:p>
      <text:p text:style-name="Text_20_body">- Gyümölcs</text:p>
      <text:p text:style-name="Text_20_body">- Tejtermék</text:p>
      <text:p text:style-name="Text_20_body">- Hús</text:p>
      <text:p text:style-name="Text_20_body">- Pékáru</text:p>
      <text:p text:style-name="Text_20_body">- Háztartás</text:p>
      <text:p text:style-name="Text_20_body"/>
      <text:p text:style-name="Text_20_body">Haszna:</text:p>
      <text:p text:style-name="Text_20_body">- rendezettebb bevásárlólista</text:p>
      <text:p text:style-name="Text_20_body">- szűrés kategória szerint</text:p>
      <text:p text:style-name="Text_20_body">- statisztika kategóriánként</text:p>
      <text:p text:style-name="Text_20_body">- színek/ikonok később</text:p>
      <text:p text:style-name="Text_20_body"/>
      <text:p text:style-name="Text_20_body">Kapcsolat:</text:p>
      <text:p text:style-name="Text_20_body">Category 1 - N Item</text:p>
      <text:p text:style-name="Text_20_body">Item -&gt; categoryId</text:p>
      <text:p text:style-name="Text_20_body"/>
      <text:p text:style-name="Text_20_body">2. Store / Bolt</text:p>
      <text:p text:style-name="Text_20_body">Kollekció: stores</text:p>
      <text:p text:style-name="Text_20_body"/>
      <text:p text:style-name="Text_20_body">Példák:</text:p>
      <text:p text:style-name="Text_20_body">- Lidl</text:p>
      <text:p text:style-name="Text_20_body">- Aldi</text:p>
      <text:p text:style-name="Text_20_body">- Tesco</text:p>
      <text:p text:style-name="Text_20_body">- Spar</text:p>
      <text:p text:style-name="Text_20_body">- Piac</text:p>
      <text:p text:style-name="Text_20_body">- DM</text:p>
      <text:p text:style-name="Text_20_body"/>
      <text:p text:style-name="Text_20_body">Haszna:</text:p>
      <text:p text:style-name="Text_20_body"><text:soft-page-break/>- bevásárlólisták boltonként</text:p>
      <text:p text:style-name="Text_20_body">- itemek csoportosítása bolt szerint</text:p>
      <text:p text:style-name="Text_20_body">- kedvenc bolt mentése userenként</text:p>
      <text:p text:style-name="Text_20_body"/>
      <text:p text:style-name="Text_20_body">Kapcsolat:</text:p>
      <text:p text:style-name="Text_20_body">Store 1 - N List</text:p>
      <text:p text:style-name="Text_20_body">List -&gt; storeId</text:p>
      <text:p text:style-name="Text_20_body"/>
      <text:p text:style-name="Text_20_body">---</text:p>
      <text:p text:style-name="Text_20_body"/>
      <text:p text:style-name="Text_20_body">PROMPT:</text:p>
      <text:p text:style-name="Text_20_body">Ok ezeket valósitsd meg ilyen sorredben. Árak összehasonlítása nem kell.</text:p>
      <text:p text:style-name="Text_20_body"/>
      <text:p text:style-name="Text_20_body">VÁLASZ:</text:p>
      <text:p text:style-name="Text_20_body">Megvalósult két új kollekció:</text:p>
      <text:p text:style-name="Text_20_body"/>
      <text:p text:style-name="Text_20_body">1. Category / Kategória</text:p>
      <text:p text:style-name="Text_20_body">Backend model:</text:p>
      <text:p text:style-name="Text_20_body">- backend/src/models/Category.js</text:p>
      <text:p text:style-name="Text_20_body"/>
      <text:p text:style-name="Text_20_body">Backend route:</text:p>
      <text:p text:style-name="Text_20_body">- backend/src/routes/categories.js</text:p>
      <text:p text:style-name="Text_20_body"/>
      <text:p text:style-name="Text_20_body">API:</text:p>
      <text:p text:style-name="Text_20_body">- GET /api/categories</text:p>
      <text:p text:style-name="Text_20_body">- POST /api/categories</text:p>
      <text:p text:style-name="Text_20_body">- DELETE /api/categories/:id</text:p>
      <text:p text:style-name="Text_20_body"/>
      <text:p text:style-name="Text_20_body">Frontend:</text:p>
      <text:p text:style-name="Text_20_body">- új kategória létrehozható</text:p>
      <text:p text:style-name="Text_20_body">- itemhez kategória rendelhető</text:p>
      <text:p text:style-name="Text_20_body">- item sorban megjelenik a kategória neve</text:p>
      <text:p text:style-name="Text_20_body"><text:soft-page-break/></text:p>
      <text:p text:style-name="Text_20_body">2. Store / Bolt</text:p>
      <text:p text:style-name="Text_20_body">Backend model:</text:p>
      <text:p text:style-name="Text_20_body">- backend/src/models/Store.js</text:p>
      <text:p text:style-name="Text_20_body"/>
      <text:p text:style-name="Text_20_body">Backend route:</text:p>
      <text:p text:style-name="Text_20_body">- backend/src/routes/stores.js</text:p>
      <text:p text:style-name="Text_20_body"/>
      <text:p text:style-name="Text_20_body">API:</text:p>
      <text:p text:style-name="Text_20_body">- GET /api/stores</text:p>
      <text:p text:style-name="Text_20_body">- POST /api/stores</text:p>
      <text:p text:style-name="Text_20_body">- DELETE /api/stores/:id</text:p>
      <text:p text:style-name="Text_20_body"/>
      <text:p text:style-name="Text_20_body">Frontend:</text:p>
      <text:p text:style-name="Text_20_body">- új bolt létrehozható</text:p>
      <text:p text:style-name="Text_20_body">- aktuális listához bolt rendelhető</text:p>
      <text:p text:style-name="Text_20_body">- bolt neve megjelenik a lista neve alatt</text:p>
      <text:p text:style-name="Text_20_body"/>
      <text:p text:style-name="Text_20_body">Az ár-összehasonlítás nem készült el, mert nem volt kérve.</text:p>
      <text:p text:style-name="Text_20_body"/>
      <text:p text:style-name="Text_20_body">Új kollekciók:</text:p>
      <text:p text:style-name="Text_20_body">- users</text:p>
      <text:p text:style-name="Text_20_body">- lists</text:p>
      <text:p text:style-name="Text_20_body">- items</text:p>
      <text:p text:style-name="Text_20_body">- categories</text:p>
      <text:p text:style-name="Text_20_body">- stores</text:p>
      <text:p text:style-name="Text_20_body"/>
      <text:p text:style-name="Text_20_body">---</text:p>
      <text:p text:style-name="Text_20_body"/>
      <text:p text:style-name="Text_20_body">PROMPT:</text:p>
      <text:p text:style-name="Text_20_body">most állítsd le és indítsd újra a mongot</text:p>
      <text:p text:style-name="Text_20_body"/>
      <text:p text:style-name="Text_20_body"><text:soft-page-break/>VÁLASZ:</text:p>
      <text:p text:style-name="Text_20_body">A MongoDB Docker konténert nem lehetett innen újraindítani, mert a Docker sockethez nem volt jogosultság.</text:p>
      <text:p text:style-name="Text_20_body"/>
      <text:p text:style-name="Text_20_body">Hiba:</text:p>
      <text:p text:style-name="Text_20_body">permission denied while trying to connect to the docker API at unix:///var/run/docker.sock</text:p>
      <text:p text:style-name="Text_20_body"/>
      <text:p text:style-name="Text_20_body">Javasolt parancs:</text:p>
      <text:p text:style-name="Text_20_body">cd /home/bakisz/Gi_msc_szoftveres_targyai_/4th_semester/Rf_Dinnyes_balazs01</text:p>
      <text:p text:style-name="Text_20_body">sudo docker compose restart mongodb</text:p>
      <text:p text:style-name="Text_20_body"/>
      <text:p text:style-name="Text_20_body">Ellenőrzés:</text:p>
      <text:p text:style-name="Text_20_body">sudo docker compose ps</text:p>
      <text:p text:style-name="Text_20_body"/>
      <text:p text:style-name="Text_20_body">---</text:p>
      <text:p text:style-name="Text_20_body"/>
      <text:p text:style-name="Text_20_body">PROMPT:</text:p>
      <text:p text:style-name="Text_20_body">le kellen újra állítani és indítani a mongot</text:p>
      <text:p text:style-name="Text_20_body"/>
      <text:p text:style-name="Text_20_body">VÁLASZ:</text:p>
      <text:p text:style-name="Text_20_body">A MongoDB Docker konténert nem lehetett innen újraindítani, mert a Docker sockethez nem volt jogosultság.</text:p>
      <text:p text:style-name="Text_20_body"/>
      <text:p text:style-name="Text_20_body">Javasolt parancs:</text:p>
      <text:p text:style-name="Text_20_body">cd /home/bakisz/Gi_msc_szoftveres_targyai_/4th_semester/Rf_Dinnyes_balazs01</text:p>
      <text:p text:style-name="Text_20_body">sudo docker compose restart mongodb</text:p>
      <text:p text:style-name="Text_20_body"/>
      <text:p text:style-name="Text_20_body">Ellenőrzés:</text:p>
      <text:p text:style-name="Text_20_body">sudo docker compose ps</text:p>
      <text:p text:style-name="Text_20_body"/>
      <text:p text:style-name="Text_20_body">Ha a backend nem csatlakozik vissza:</text:p>
      <text:p text:style-name="Text_20_body">cd backend</text:p>
      <text:p text:style-name="Text_20_body"><text:soft-page-break/>npm run dev</text:p>
      <text:p text:style-name="Text_20_body"/>
      <text:p text:style-name="Text_20_body">---</text:p>
      <text:p text:style-name="Text_20_body"/>
      <text:p text:style-name="Text_20_body">PROMPT:</text:p>
      <text:p text:style-name="Text_20_body">Error: listen EADDRINUSE: address already in use :::3000</text:p>
      <text:p text:style-name="Text_20_body"/>
      <text:p text:style-name="Text_20_body">VÁLASZ:</text:p>
      <text:p text:style-name="Text_20_body">A hiba oka az volt, hogy több backend / nodemon példány futott egyszerre, és foglalták a 3000-es portot.</text:p>
      <text:p text:style-name="Text_20_body"/>
      <text:p text:style-name="Text_20_body">Megoldás:</text:p>
      <text:p text:style-name="Text_20_body">- duplikált backend folyamatok megkeresése</text:p>
      <text:p text:style-name="Text_20_body">- régi node/nodemon példányok leállítása</text:p>
      <text:p text:style-name="Text_20_body">- backend újraindítása egy példányban</text:p>
      <text:p text:style-name="Text_20_body"/>
      <text:p text:style-name="Text_20_body">Eredmény:</text:p>
      <text:p text:style-name="Text_20_body">Server running on port 3000</text:p>
      <text:p text:style-name="Text_20_body">MongoDB connected</text:p>
      <text:p text:style-name="Text_20_body"/>
      <text:p text:style-name="Text_20_body">---</text:p>
      <text:p text:style-name="Text_20_body"/>
      <text:p text:style-name="Text_20_body">PROMPT:</text:p>
      <text:p text:style-name="Text_20_body">Mikor a boltot kiválasztom, akkor a lista nevénél is változzon aktualizálódjon!</text:p>
      <text:p text:style-name="Text_20_body"/>
      <text:p text:style-name="Text_20_body">VÁLASZ:</text:p>
      <text:p text:style-name="Text_20_body">Megvalósult, hogy az aktuálisan kiválasztott listánál a bolt módosítható legyen.</text:p>
      <text:p text:style-name="Text_20_body"/>
      <text:p text:style-name="Text_20_body">Működés:</text:p>
      <text:p text:style-name="Text_20_body">- a kiválasztott lista neve alatt megjelent egy Bolt választó</text:p>
      <text:p text:style-name="Text_20_body">- bolt kiválasztásakor a frontend elküldi a módosítást a backendnek</text:p>
      <text:p text:style-name="Text_20_body">- a kiválasztott lista frissül</text:p>
      <text:p text:style-name="Text_20_body"><text:soft-page-break/>- a bal oldali listanézetben a lista neve alatti bolt is azonnal aktualizálódik</text:p>
      <text:p text:style-name="Text_20_body">- siker esetén snackbar jelenik meg:</text:p>
      <text:p text:style-name="Text_20_body"><text:s text:c="2"/>A lista boltja frissitve.</text:p>
      <text:p text:style-name="Text_20_body"/>
      <text:p text:style-name="Text_20_body">Módosított fájlok:</text:p>
      <text:p text:style-name="Text_20_body">- frontend/src/app/app.component.ts</text:p>
      <text:p text:style-name="Text_20_body">- frontend/src/app/app.component.html</text:p>
      <text:p text:style-name="Text_20_body">- frontend/src/app/app.component.scss</text:p>
      <text:p text:style-name="Text_20_body"/>
      <text:p text:style-name="Text_20_body">---</text:p>
      <text:p text:style-name="Text_20_body"/>
      <text:p text:style-name="Text_20_body">PROMPT:</text:p>
      <text:p text:style-name="Text_20_body">a bal oldali sávból kiveheted a boltválaszót, nincs funkciója</text:p>
      <text:p text:style-name="Text_20_body"/>
      <text:p text:style-name="Text_20_body">VÁLASZ:</text:p>
      <text:p text:style-name="Text_20_body">A bal oldali sávból ki lett véve az új lista létrehozásánál lévő boltválasztó.</text:p>
      <text:p text:style-name="Text_20_body"/>
      <text:p text:style-name="Text_20_body">Most:</text:p>
      <text:p text:style-name="Text_20_body">- bal oldalt csak lista neve alapján lehet listát létrehozni</text:p>
      <text:p text:style-name="Text_20_body">- boltot továbbra is az aktuális kiválasztott lista fejlécében lehet hozzárendelni/módosítani</text:p>
      <text:p text:style-name="Text_20_body">- a felesleges newListStoreId frontend állapot is ki lett szedve</text:p>
      <text:p text:style-name="Text_20_body"/>
      <text:p text:style-name="Text_20_body">Ellenőrzés:</text:p>
      <text:p text:style-name="Text_20_body">npm run build sikeresen lefutott.</text:p>
      <text:p text:style-name="Text_20_body"/>
      <text:h text:style-name="Heading_20_1" text:outline-level="1"><text:bookmark-start text:name="__RefHeading___Toc173_1169632187"/>Codex prompt értékelések indoklások<text:bookmark-end text:name="__RefHeading___Toc173_1169632187"/></text:h>
      <text:p text:style-name="Text_20_body"/>
      <text:p text:style-name="Text_20_body">PROMPT ÉRTÉKELÉSI ÖSSZEFOGLALÓ</text:p>
      <text:p text:style-name="Text_20_body"/>
      <text:p text:style-name="Text_20_body">1. Prompt: látod a szessönt?</text:p>
      <text:p text:style-name="Text_20_body">Állapot: Sikeres</text:p>
      <text:p text:style-name="Text_20_body"><text:soft-page-break/>Indoklás: A session kontextus, workspace és nyitott fájlok azonosítva lettek.</text:p>
      <text:p text:style-name="Text_20_body"/>
      <text:p text:style-name="Text_20_body">2. Prompt: frontend és további lépések útmutatója</text:p>
      <text:p text:style-name="Text_20_body">Állapot: Sikeres</text:p>
      <text:p text:style-name="Text_20_body">Indoklás: Készült rövid fejlesztési terv és javasolt promptlista.</text:p>
      <text:p text:style-name="Text_20_body"/>
      <text:p text:style-name="Text_20_body">3. Prompt: Angular alap projekt létrehozása MEAN stackhez</text:p>
      <text:p text:style-name="Text_20_body">Állapot: Sikeres</text:p>
      <text:p text:style-name="Text_20_body">Indoklás: Létrejött a frontend Angular projekt routinggal, SCSS-sel, proxyval és alap service/model réteggel.</text:p>
      <text:p text:style-name="Text_20_body"/>
      <text:p text:style-name="Text_20_body">4. Prompt: frontend összekötése a backend /lists route-jaival</text:p>
      <text:p text:style-name="Text_20_body">Állapot: Sikeres</text:p>
      <text:p text:style-name="Text_20_body">Indoklás: A frontend meghívja a list és item CRUD végpontokat.</text:p>
      <text:p text:style-name="Text_20_body"/>
      <text:p text:style-name="Text_20_body">5. Prompt: modern kétpaneles bevásárlólista felület</text:p>
      <text:p text:style-name="Text_20_body">Állapot: Sikeres</text:p>
      <text:p text:style-name="Text_20_body">Indoklás: Elkészült a bal oldali listapanel és jobb oldali item panel.</text:p>
      <text:p text:style-name="Text_20_body"/>
      <text:p text:style-name="Text_20_body">6. Prompt: itemek húzással rendezése</text:p>
      <text:p text:style-name="Text_20_body">Állapot: Sikeres</text:p>
      <text:p text:style-name="Text_20_body">Indoklás: A frontend drag and drop rendezést kapott, és menti a sorrendet a backend reorder route-on.</text:p>
      <text:p text:style-name="Text_20_body"/>
      <text:p text:style-name="Text_20_body">7. Prompt: admin/user autentikáció, hash-elt jelszóval</text:p>
      <text:p text:style-name="Text_20_body">Állapot: Sikeres</text:p>
      <text:p text:style-name="Text_20_body">Indoklás: Elkészült a User modell, bcrypt hash, JWT auth, login/register felület és admin user manager.</text:p>
      <text:p text:style-name="Text_20_body"/>
      <text:p text:style-name="Text_20_body">8. Prompt: admin belépési adatok megosztása</text:p>
      <text:p text:style-name="Text_20_body">Állapot: Részben sikeres</text:p>
      <text:p text:style-name="Text_20_body">Indoklás: Nem volt előre létrehozott admin adat, de tisztázva lett, hogy az első regisztrált user lesz admin.</text:p>
      <text:p text:style-name="Text_20_body"><text:soft-page-break/></text:p>
      <text:p text:style-name="Text_20_body">9. Prompt: sikertelen regisztráció javítása</text:p>
      <text:p text:style-name="Text_20_body">Állapot: Sikeres</text:p>
      <text:p text:style-name="Text_20_body">Indoklás: Kiderült, hogy régi backend példány futott. Újraindítás után a regisztráció működött.</text:p>
      <text:p text:style-name="Text_20_body"/>
      <text:p text:style-name="Text_20_body">10. Prompt: lista törlés megerősítés, jelszó láthatóság, dupla jelszó regisztrációnál</text:p>
      <text:p text:style-name="Text_20_body">Állapot: Sikeres</text:p>
      <text:p text:style-name="Text_20_body">Indoklás: Minden kért UI és validációs funkció megvalósult.</text:p>
      <text:p text:style-name="Text_20_body"/>
      <text:p text:style-name="Text_20_body">11. Prompt: halvány bevásárlós/ételes/gyümölcsös háttér minden oldalon</text:p>
      <text:p text:style-name="Text_20_body">Állapot: Sikeres</text:p>
      <text:p text:style-name="Text_20_body">Indoklás: Készült közös food-pattern.svg háttér, amely minden fő nézeten megjelenik.</text:p>
      <text:p text:style-name="Text_20_body"/>
      <text:p text:style-name="Text_20_body">12. Prompt: világos/sötét mód sarki ikonnal</text:p>
      <text:p text:style-name="Text_20_body">Állapot: Sikeres</text:p>
      <text:p text:style-name="Text_20_body">Indoklás: Elkészült a jobb felső ikon alapú téma váltó localStorage mentéssel.</text:p>
      <text:p text:style-name="Text_20_body"/>
      <text:p text:style-name="Text_20_body">13. Prompt: admin user törlés megerősítés és snackbar</text:p>
      <text:p text:style-name="Text_20_body">Állapot: Sikeres</text:p>
      <text:p text:style-name="Text_20_body">Indoklás: Megmaradt a confirm ablak, és sikeres törlés után 2 másodperces snackbar jelenik meg.</text:p>
      <text:p text:style-name="Text_20_body"/>
      <text:p text:style-name="Text_20_body">14. Prompt: user tudjon keresni a listái között</text:p>
      <text:p text:style-name="Text_20_body">Állapot: Sikeres</text:p>
      <text:p text:style-name="Text_20_body">Indoklás: Elkészült a bal oldali keresőmező, amely gépelés közben szűri a listákat.</text:p>
      <text:p text:style-name="Text_20_body"/>
      <text:p text:style-name="Text_20_body">15. Prompt: hány adatbázis entitást használ a projekt</text:p>
      <text:p text:style-name="Text_20_body">Állapot: Sikeres</text:p>
      <text:p text:style-name="Text_20_body">Indoklás: Az akkori állapot alapján helyesen azonosítva lett a 3 kollekció: users, lists, items.</text:p>
      <text:p text:style-name="Text_20_body"/>
      <text:p text:style-name="Text_20_body">16. Prompt: javasolj további 2 kollekciót</text:p>
      <text:p text:style-name="Text_20_body">Állapot: Sikeres</text:p>
      <text:p text:style-name="Text_20_body">Indoklás: Javaslat született Category és Store kollekciókra, rövid indoklással.</text:p>
      <text:p text:style-name="Text_20_body"><text:soft-page-break/></text:p>
      <text:p text:style-name="Text_20_body">17. Prompt: Category és Store megvalósítása, ár-összehasonlítás nélkül</text:p>
      <text:p text:style-name="Text_20_body">Állapot: Sikeres</text:p>
      <text:p text:style-name="Text_20_body">Indoklás: Létrejött a categories és stores kollekció, backend route, frontend létrehozás és hozzárendelés.</text:p>
      <text:p text:style-name="Text_20_body"/>
      <text:p text:style-name="Text_20_body">18. Prompt: MongoDB leállítása és újraindítása</text:p>
      <text:p text:style-name="Text_20_body">Állapot: Sikertelen</text:p>
      <text:p text:style-name="Text_20_body">Indoklás: Docker socket jogosultság hiánya miatt nem lehetett végrehajtani innen. Sudo parancs lett megadva manuális futtatáshoz.</text:p>
      <text:p text:style-name="Text_20_body"/>
      <text:p text:style-name="Text_20_body">19. Prompt: MongoDB újraindítása újra</text:p>
      <text:p text:style-name="Text_20_body">Állapot: Sikertelen</text:p>
      <text:p text:style-name="Text_20_body">Indoklás: Ugyanaz a Docker jogosultsági probléma állt fenn.</text:p>
      <text:p text:style-name="Text_20_body"/>
      <text:p text:style-name="Text_20_body">20. Prompt: EADDRINUSE hiba javítása</text:p>
      <text:p text:style-name="Text_20_body">Állapot: Sikeres</text:p>
      <text:p text:style-name="Text_20_body">Indoklás: Több backend/nodemon folyamat futott. A duplikált folyamatok le lettek állítva, majd a backend újraindult.</text:p>
      <text:p text:style-name="Text_20_body"/>
      <text:p text:style-name="Text_20_body">21. Prompt: bolt kiválasztásakor a lista neve melletti adat frissüljön</text:p>
      <text:p text:style-name="Text_20_body">Állapot: Sikeres</text:p>
      <text:p text:style-name="Text_20_body">Indoklás: Az aktuális lista fejlécébe bekerült a bolt választó, amely menti és frissíti a bal oldali listanézetet is.</text:p>
      <text:p text:style-name="Text_20_body"/>
      <text:p text:style-name="Text_20_body">22. Prompt: bal oldali sávból boltválasztó kivétele</text:p>
      <text:p text:style-name="Text_20_body">Állapot: Sikeres</text:p>
      <text:p text:style-name="Text_20_body">Indoklás: Az új lista létrehozásából ki lett véve a boltválasztó, a bolt módosítása csak az aktuális lista fejlécében maradt.</text:p>
      <text:p text:style-name="Text_20_body"/>
      <text:p text:style-name="Text_20_body">23. Prompt: eddigi promptok és válaszok kimásolható összefoglalása</text:p>
      <text:p text:style-name="Text_20_body">Állapot: Sikeres</text:p>
      <text:p text:style-name="Text_20_body">Indoklás: Készült másolható összefoglaló a főbb promptokról és válaszokról.</text:p>
      <text:p text:style-name="Text_20_body"><text:soft-page-break/></text:p>
      <text:p text:style-name="Text_20_body">24. Prompt: minden másolható formában legyen</text:p>
      <text:p text:style-name="Text_20_body">Állapot: Sikeres</text:p>
      <text:p text:style-name="Text_20_body">Indoklás: Az összefoglaló plain text kó blokkban készült.</text:p>
      <text:p text:style-name="Text_20_body"/>
      <text:p text:style-name="Text_20_body">25. Prompt: promptok és válaszok összefoglalása egyben másolható formában</text:p>
      <text:p text:style-name="Text_20_body">Állapot: Sikeres</text:p>
      <text:p text:style-name="Text_20_body">Indoklás: Készült promptonként bontott, egyben másolható összefoglaló.</text:p>
      <text:p text:style-name="Text_20_body"/>
      <text:p text:style-name="Text_20_body">ÖSSZESÍTÉS</text:p>
      <text:p text:style-name="Text_20_body"/>
      <text:p text:style-name="Text_20_body">Sikeres promptok száma: 22</text:p>
      <text:p text:style-name="Text_20_body">Részben sikeres promptok száma: 1</text:p>
      <text:p text:style-name="Text_20_body">Sikertelen promptok száma: 2</text:p>
      <text:p text:style-name="Text_20_body"/>
      <text:p text:style-name="Text_20_body">Sikertelen promptok oka:</text:p>
      <text:p text:style-name="Text_20_body">- A MongoDB Docker konténer újraindítását a rendszer jogosultsági okból nem engedte.</text:p>
      <text:p text:style-name="Text_20_body">- A docker API sockethez nem volt hozzáférés.</text:p>
      <text:p text:style-name="Text_20_body">- A sudo futtatáshoz jelszó kellett, amit az asszisztens nem tud megadni.</text:p>
      <text:p text:style-name="Text_20_body"/>
      <text:p text:style-name="Text_20_body">Részben sikeres prompt oka:</text:p>
      <text:p text:style-name="Text_20_body">- Admin belépési adat nem létezett előre, de a rendszer működése tisztázva lett, és létrejött admin user az első regisztrációv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0T21:40:17.396112058</meta:creation-date>
    <dc:date>2026-05-10T22:01:10.538935892</dc:date>
    <meta:editing-duration>PT10M3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7" meta:paragraph-count="668" meta:word-count="3345" meta:character-count="23260" meta:non-whitespace-character-count="20681"/>
  </office:meta>
</office:document-meta>
</file>